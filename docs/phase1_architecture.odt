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8cm" table:align="left"/>
    </style:style>
    <style:style style:name="Table1.A" style:family="table-column">
      <style:table-column-properties style:column-width="4.036cm"/>
    </style:style>
    <style:style style:name="Table1.B" style:family="table-column">
      <style:table-column-properties style:column-width="3.745cm"/>
    </style:style>
    <style:style style:name="Table1.C" style:family="table-column">
      <style:table-column-properties style:column-width="10.2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8cm" table:align="left"/>
    </style:style>
    <style:style style:name="Table2.A" style:family="table-column">
      <style:table-column-properties style:column-width="4.475cm"/>
    </style:style>
    <style:style style:name="Table2.B" style:family="table-column">
      <style:table-column-properties style:column-width="5.965cm"/>
    </style:style>
    <style:style style:name="Table2.C" style:family="table-column">
      <style:table-column-properties style:column-width="7.5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8cm" table:align="left"/>
    </style:style>
    <style:style style:name="Table3.A" style:family="table-column">
      <style:table-column-properties style:column-width="5.588cm"/>
    </style:style>
    <style:style style:name="Table3.B" style:family="table-column">
      <style:table-column-properties style:column-width="12.41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8cm" table:align="left"/>
    </style:style>
    <style:style style:name="Table4.A" style:family="table-column">
      <style:table-column-properties style:column-width="6.551cm"/>
    </style:style>
    <style:style style:name="Table4.B" style:family="table-column">
      <style:table-column-properties style:column-width="11.449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Horizontal_20_Line">
      <style:paragraph-properties fo:text-align="center" style:justify-single-word="false"/>
    </style:style>
    <style:style style:name="P2" style:family="paragraph" style:parent-style-name="Heading_20_1" style:master-page-name="HTML">
      <style:paragraph-properties fo:margin-left="0cm" fo:margin-right="0cm" fo:text-align="center" style:justify-single-word="false" fo:text-indent="0cm" style:auto-text-indent="false" style:page-number="auto"/>
      <style:text-properties loext:padding="0cm" loext:border="none"/>
    </style:style>
    <style:style style:name="P3" style:family="paragraph" style:parent-style-name="Text_20_body">
      <style:paragraph-properties fo:margin-left="0.318cm" fo:margin-right="0.318cm" fo:margin-top="0.318cm" fo:margin-bottom="0.318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2c5f8a" loext:opacity="100%" fo:font-size="15pt" fo:font-weight="bold" loext:padding="0cm" loext:border="none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444444" loext:opacity="100%" fo:font-size="14pt" loext:padding="0cm" loext:border="none"/>
    </style:style>
    <style:style style:name="P6" style:family="paragraph" style:parent-style-name="Text_20_body">
      <style:paragraph-properties fo:text-align="center" style:justify-single-word="false"/>
      <style:text-properties loext:padding="0cm" loext:border="non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>
      <style:paragraph-properties fo:margin-top="0cm" fo:margin-bottom="0cm" style:contextual-spacing="false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888888" loext:opacity="100%" fo:font-size="9pt"/>
    </style:style>
    <style:style style:name="T1" style:family="text">
      <style:text-properties fo:font-size="10pt" fo:background-color="#fff8e1" loext:char-shading-value="0" loext:padding-left="0.37cm" loext:padding-right="0cm" loext:padding-top="0cm" loext:padding-bottom="0cm" loext:border-left="3pt solid #f0a500" loext:border-right="none" loext:border-top="none" loext:border-bottom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o-One RMM</text:p>
      <text:p text:style-name="P4">Alternative moderne à Action1, NinjaOne, ConnectWise Automate</text:p>
      <text:p text:style-name="P1"/>
      <text:p text:style-name="P5">PHASE 1 — Architecture Globale, Protocoles Sécurisés &amp; Cycle de Vie de l'Agent</text:p>
      <text:p text:style-name="P6">Stack : Agent C | Backend Go | Frontend React/TS | PostgreSQL + TimescaleDB</text:p>
      <text:p text:style-name="P6">Protocole Agent ↔ Backend : WebSocket Secure (WSS) + mTLS</text:p>
      <text:p text:style-name="P6">Document généré le 24 juin 2026</text:p>
      <text:p text:style-name="Horizontal_20_Line"/>
      <text:h text:style-name="Heading_20_2" text:outline-level="2">1. Vue d'Ensemble du Système — Macro-Architecture</text:h>
      <text:p text:style-name="Text_20_body">Le système Leo-One est composé de trois couches principales communiquant exclusivement via TLS 1.3 :</text:p>
      <text:list text:style-name="L1">
        <text:list-item>
          <text:p text:style-name="P8"><text:span text:style-name="Strong_20_Emphasis">Agents C</text:span> — démons légers déployés sur chaque machine cible (Windows, Linux, macOS) </text:p>
        </text:list-item>
        <text:list-item>
          <text:p text:style-name="P8"><text:span text:style-name="Strong_20_Emphasis">Backend Go</text:span> — serveur central traitant les données, exposant les API REST et le gateway agent </text:p>
        </text:list-item>
        <text:list-item>
          <text:p text:style-name="P7"><text:span text:style-name="Strong_20_Emphasis">Frontend React/TS</text:span> — interface web temps réel pour les techniciens MSP </text:p>
        </text:list-item>
      </text:list>
      <text:p text:style-name="Preformatted_20_Text">┌─────────────────────────────────────────────────────────────────────────────────┐</text:p>
      <text:p text:style-name="Preformatted_20_Text">│ <text:s/>RÉSEAU PUBLIC / INTERNET (TLS 1.3 obligatoire sur toutes les connexions) <text:s text:c="5"/>│</text:p>
      <text:p text:style-name="Preformatted_20_Text">└─────────────────────────────────────────────────────────────────────────────────┘</text:p>
      <text:p text:style-name="Preformatted_20_Text"/>
      <text:p text:style-name="Preformatted_20_Text">╔══════════════════════════╗ <text:s text:c="5"/>WSS/TLS 1.3+mTLS <text:s text:c="3"/>╔══════════════════════════════╗</text:p>
      <text:p text:style-name="Preformatted_20_Text">║ <text:s text:c="2"/>MACHINES CIBLES <text:s text:c="7"/>║ ════════════════════════&gt; ║ <text:s text:c="2"/>INFRASTRUCTURE SERVEUR <text:s text:c="3"/>║</text:p>
      <text:p text:style-name="Preformatted_20_Text">║ <text:s text:c="25"/>║ <text:s text:c="26"/>║ <text:s text:c="29"/>║</text:p>
      <text:p text:style-name="Preformatted_20_Text">║ <text:s/>┌────────────────────┐ <text:s/>║ <text:s text:c="26"/>║ <text:s/>┌──────────────────────┐ <text:s text:c="2"/>║</text:p>
      <text:p text:style-name="Preformatted_20_Text">║ <text:s/>│ <text:s/>Agent C (daemon) <text:s/>│ <text:s/>║ <text:s text:c="26"/>║ <text:s/>│ <text:s/>Reverse Proxy / LB <text:s/>│ <text:s text:c="2"/>║</text:p>
      <text:p text:style-name="Preformatted_20_Text">║ <text:s/>│ <text:s/>• Collecte métr. <text:s/>│ <text:s/>║ <text:s text:c="26"/>║ <text:s/>│ <text:s/>(TLS Termination) <text:s text:c="2"/>│ <text:s text:c="2"/>║</text:p>
      <text:p text:style-name="Preformatted_20_Text">║ <text:s/>│ <text:s/>• Exec. scripts <text:s text:c="2"/>│ <text:s/>║ <text:s text:c="26"/>║ <text:s/>└──────────┬───────────┘ <text:s text:c="2"/>║</text:p>
      <text:p text:style-name="Preformatted_20_Text">║ <text:s/>│ <text:s/>• Inventaire HW <text:s text:c="2"/>│ <text:s/>║ <text:s text:c="26"/>║ <text:s text:c="12"/>│ <text:s text:c="14"/>║</text:p>
      <text:p text:style-name="Preformatted_20_Text">║ <text:s/>│ <text:s/>• Reconnexion auto│ <text:s/>║ <text:s text:c="26"/>║ <text:s/>┌──────────▼───────────┐ <text:s text:c="2"/>║</text:p>
      <text:p text:style-name="Preformatted_20_Text">║ <text:s/>│ <text:s/>• Clé mTLS locale │ <text:s/>║ <text:s text:c="26"/>║ <text:s/>│ <text:s/>Backend Go <text:s text:c="9"/>│ <text:s text:c="2"/>║</text:p>
      <text:p text:style-name="Preformatted_20_Text">║ <text:s/>└────────────────────┘ <text:s/>║ <text:s text:c="26"/>║ <text:s/>│ <text:s/>Agent Gateway (WSS) │ <text:s text:c="2"/>║</text:p>
      <text:p text:style-name="Preformatted_20_Text">║ <text:s text:c="25"/>║ <text:s text:c="26"/>║ <text:s/>│ <text:s/>REST API (JSON) <text:s text:c="4"/>│ <text:s text:c="2"/>║</text:p>
      <text:p text:style-name="Preformatted_20_Text">║ <text:s/>[Windows / Linux / macOS] <text:s text:c="26"/>║ <text:s/>│ <text:s/>Auth / RBAC / MFA <text:s text:c="2"/>│ <text:s text:c="2"/>║</text:p>
      <text:p text:style-name="Preformatted_20_Text">╚══════════════════════════╝ <text:s text:c="26"/>║ <text:s/>│ <text:s/>Business Logic <text:s text:c="5"/>│ <text:s text:c="2"/>║</text:p>
      <text:p text:style-name="Preformatted_20_Text"><text:s text:c="55"/>║ <text:s/>└──────────┬───────────┘ <text:s text:c="2"/>║</text:p>
      <text:p text:style-name="Preformatted_20_Text">╔══════════════════════════╗ <text:s text:c="5"/>HTTPS / WSS <text:s text:c="9"/>║ <text:s text:c="12"/>│ <text:s text:c="14"/>║</text:p>
      <text:p text:style-name="Preformatted_20_Text">║ <text:s text:c="2"/>UTILISATEURS (MSP) <text:s text:c="3"/>║ &lt;════════════════════════&gt; ║ <text:s/>┌──────────▼───────────┐ <text:s text:c="2"/>║</text:p>
      <text:p text:style-name="Preformatted_20_Text">║ <text:s text:c="25"/>║ <text:s text:c="26"/>║ <text:s/>│ <text:s/>PostgreSQL <text:s text:c="9"/>│ <text:s text:c="2"/>║</text:p>
      <text:p text:style-name="Preformatted_20_Text">║ <text:s/>┌────────────────────┐ <text:s/>║ <text:s text:c="26"/>║ <text:s/>│ <text:s/>+ TimescaleDB <text:s text:c="6"/>│ <text:s text:c="2"/>║</text:p>
      <text:p text:style-name="Preformatted_20_Text">║ <text:s/>│ <text:s/>Navigateur Web <text:s text:c="3"/>│ <text:s/>║ <text:s text:c="26"/>║ <text:s/>└──────────────────────┘ <text:s text:c="2"/>║</text:p>
      <text:p text:style-name="Preformatted_20_Text">║ <text:s/>│ <text:s/>React / TS / TWC <text:s/>│ <text:s/>║ <text:s text:c="26"/>╚══════════════════════════════╝</text:p>
      <text:p text:style-name="Preformatted_20_Text">║ <text:s/>└────────────────────┘ <text:s/>║</text:p>
      <text:p text:style-name="Preformatted_20_Text">╚══════════════════════════╝</text:p>
      <text:h text:style-name="Heading_20_2" text:outline-level="2">2. Modèle Multi-Tenant (Mode MSP)</text:h>
      <text:p text:style-name="Text_20_body">Le système est organisé en trois niveaux d'isolation. Chaque entité est systématiquement associée à un <text:span text:style-name="Source_20_Text">tenant_id</text:span> cryptographique, validé en middleware à chaque requête.</text:p>
      <text:p text:style-name="Preformatted_20_Text">Platform (Leo-One SaaS / On-Prem)</text:p>
      <text:p text:style-name="Preformatted_20_Text">│</text:p>
      <text:p text:style-name="Preformatted_20_Text">├── Tenant A <text:s/>(ex: "Cabinet Dupont IT")</text:p>
      <text:p text:style-name="Preformatted_20_Text">│ <text:s text:c="2"/>├── Workspace "Paris"</text:p>
      <text:p text:style-name="Preformatted_20_Text">│ <text:s text:c="2"/>│ <text:s text:c="2"/>├── Agent-001 <text:s/>(Windows Server)</text:p>
      <text:p text:style-name="Preformatted_20_Text">│ <text:s text:c="2"/>│ <text:s text:c="2"/>└── Agent-002 <text:s/>(Windows 10)</text:p>
      <text:p text:style-name="Preformatted_20_Text">│ <text:s text:c="2"/>└── Workspace "Lyon"</text:p>
      <text:p text:style-name="Preformatted_20_Text">│ <text:s text:c="6"/>└── Agent-003 <text:s/>(Ubuntu 22.04)</text:p>
      <text:p text:style-name="Preformatted_20_Text">│</text:p>
      <text:p text:style-name="Preformatted_20_Text">└── Tenant B <text:s/>(ex: "Mairie de Bordeaux")</text:p>
      <text:p text:style-name="Preformatted_20_Text"><text:s text:c="4"/>└── Workspace "Hôtel de Ville"</text:p>
      <text:p text:style-name="Preformatted_20_Text"><text:s text:c="8"/>└── Agent-004 <text:s/>(Windows 11)</text:p>
      <text:p text:style-name="P3"><text:span text:style-name="Strong_20_Emphasis"><text:span text:style-name="T1">Règle d'isolation stricte :</text:span></text:span><text:span text:style-name="T1"> il n'existe aucun chemin de code cross-tenant. Toute requête sans </text:span><text:span text:style-name="Source_20_Text"><text:span text:style-name="T1">tenant_id</text:span></text:span><text:span text:style-name="T1"> valide et cryptographiquement signé est rejetée par le middleware avant d'atteindre la logique métier. </text:span></text:p>
      <text:h text:style-name="Heading_20_2" text:outline-level="2">3. Flux Réseau Sécurisés</text:h>
      <text:h text:style-name="Heading_20_3" text:outline-level="3">3.1 — Modèle de Sécurité : Mutual TLS (mTLS)</text:h>
      <text:p text:style-name="Text_20_body">Protocole retenu : <text:span text:style-name="Strong_20_Emphasis">WebSocket Secure (WSS)</text:span> sur TLS 1.3 avec authentification mutuelle par certificat.</text:p>
      <text:p text:style-name="Preformatted_20_Text">┌──────────────────────────────────────────────────────────────────┐</text:p>
      <text:p text:style-name="Preformatted_20_Text">│ <text:s/>MODÈLE DE SÉCURITÉ TLS — Mutual TLS (mTLS) <text:s text:c="20"/>│</text:p>
      <text:p text:style-name="Preformatted_20_Text">│ <text:s text:c="65"/>│</text:p>
      <text:p text:style-name="Preformatted_20_Text">│ <text:s/>Autorité de Certification (CA) interne, gérée par le Backend <text:s text:c="2"/>│</text:p>
      <text:p text:style-name="Preformatted_20_Text">│ <text:s text:c="65"/>│</text:p>
      <text:p text:style-name="Preformatted_20_Text">│ <text:s/>┌────────────────┐ <text:s text:c="17"/>┌────────────────────────┐ <text:s/>│</text:p>
      <text:p text:style-name="Preformatted_20_Text">│ <text:s/>│ <text:s text:c="2"/>Agent C <text:s text:c="5"/>│ <text:s text:c="17"/>│ <text:s text:c="2"/>Backend Go <text:s text:c="10"/>│ <text:s/>│</text:p>
      <text:p text:style-name="Preformatted_20_Text">│ <text:s/>│ <text:s text:c="15"/>│ <text:s text:c="17"/>│ <text:s text:c="23"/>│ <text:s/>│</text:p>
      <text:p text:style-name="Preformatted_20_Text">│ <text:s/>│ cert_agent.pem │── présente ────&gt; │ valide via CA interne <text:s/>│ <text:s/>│</text:p>
      <text:p text:style-name="Preformatted_20_Text">│ <text:s/>│ key_agent.pem <text:s/>│ <text:s text:c="17"/>│ <text:s text:c="23"/>│ <text:s/>│</text:p>
      <text:p text:style-name="Preformatted_20_Text">│ <text:s/>│ <text:s text:c="15"/>│ &lt;── présente ─── │ cert_server.pem <text:s text:c="7"/>│ <text:s/>│</text:p>
      <text:p text:style-name="Preformatted_20_Text">│ <text:s/>│ valide via <text:s text:c="4"/>│ <text:s text:c="17"/>│ <text:s text:c="23"/>│ <text:s/>│</text:p>
      <text:p text:style-name="Preformatted_20_Text">│ <text:s/>│ CA pinné <text:s text:c="6"/>│ <text:s text:c="17"/>│ <text:s text:c="23"/>│ <text:s/>│</text:p>
      <text:p text:style-name="Preformatted_20_Text">│ <text:s/>│ (embarqué) <text:s text:c="4"/>│ <text:s text:c="17"/>│ <text:s text:c="23"/>│ <text:s/>│</text:p>
      <text:p text:style-name="Preformatted_20_Text">│ <text:s/>└────────────────┘ <text:s text:c="17"/>└────────────────────────┘ <text:s/>│</text:p>
      <text:p text:style-name="Preformatted_20_Text">│ <text:s text:c="65"/>│</text:p>
      <text:p text:style-name="Preformatted_20_Text">│ <text:s/>• TLS 1.3 minimum <text:s text:c="46"/>│</text:p>
      <text:p text:style-name="Preformatted_20_Text">│ <text:s/>• Suite : TLS_AES_256_GCM_SHA384 <text:s text:c="30"/>│</text:p>
      <text:p text:style-name="Preformatted_20_Text">│ <text:s/>• Certificate pinning côté agent : hash SHA-256 du cert CA <text:s text:c="4"/>│</text:p>
      <text:p text:style-name="Preformatted_20_Text">│ <text:s text:c="3"/>embarqué au moment de l'enrollment <text:s text:c="27"/>│</text:p>
      <text:p text:style-name="Preformatted_20_Text">└──────────────────────────────────────────────────────────────────┘</text:p>
      <text:h text:style-name="Heading_20_3" text:outline-level="3">3.2 — Handshake WSS Complet</text:h>
      <text:p text:style-name="Preformatted_20_Text">Agent C <text:s text:c="35"/>Backend Go (Agent Gateway)</text:p>
      <text:p text:style-name="Preformatted_20_Text"><text:s text:c="4"/>│ <text:s text:c="45"/>│</text:p>
      <text:p text:style-name="Preformatted_20_Text"><text:s text:c="4"/>│──── TCP connect → port 443 ───────────────&gt; │</text:p>
      <text:p text:style-name="Preformatted_20_Text"><text:s text:c="4"/>│──── TLS 1.3 ClientHello (cert client) ────&gt; │</text:p>
      <text:p text:style-name="Preformatted_20_Text"><text:s text:c="4"/>│&lt;─── TLS 1.3 ServerHello + ServerCert ───── <text:s/>│</text:p>
      <text:p text:style-name="Preformatted_20_Text"><text:s text:c="4"/>│──── TLS 1.3 Finished (mTLS complet) ──────&gt; │</text:p>
      <text:p text:style-name="Preformatted_20_Text"><text:s text:c="4"/>│ <text:s text:c="45"/>│</text:p>
      <text:p text:style-name="Preformatted_20_Text"><text:s text:c="4"/>│──── HTTP GET /ws/agent HTTP/1.1 ──────────&gt; │</text:p>
      <text:p text:style-name="Preformatted_20_Text"><text:s text:c="4"/>│ <text:s text:c="4"/>Headers: <text:s text:c="32"/>│</text:p>
      <text:p text:style-name="Preformatted_20_Text"><text:s text:c="4"/>│ <text:s text:c="6"/>Upgrade: websocket <text:s text:c="20"/>│</text:p>
      <text:p text:style-name="Preformatted_20_Text"><text:s text:c="4"/>│ <text:s text:c="6"/>Connection: Upgrade <text:s text:c="19"/>│</text:p>
      <text:p text:style-name="Preformatted_20_Text"><text:s text:c="4"/>│ <text:s text:c="6"/>Sec-WebSocket-Key: &lt;base64&gt; <text:s text:c="11"/>│</text:p>
      <text:p text:style-name="Preformatted_20_Text"><text:s text:c="4"/>│ <text:s text:c="6"/>Sec-WebSocket-Version: 13 <text:s text:c="13"/>│</text:p>
      <text:p text:style-name="Preformatted_20_Text"><text:s text:c="4"/>│ <text:s text:c="6"/>X-Agent-ID: &lt;uuid&gt; <text:s text:c="20"/>│</text:p>
      <text:p text:style-name="Preformatted_20_Text"><text:s text:c="4"/>│ <text:s text:c="6"/>X-Agent-Version: 1.0.0 <text:s text:c="16"/>│</text:p>
      <text:p text:style-name="Preformatted_20_Text"><text:s text:c="4"/>│ <text:s text:c="45"/>│</text:p>
      <text:p text:style-name="Preformatted_20_Text"><text:s text:c="4"/>│&lt;─── HTTP 101 Switching Protocols ────────── <text:s/>│</text:p>
      <text:p text:style-name="Preformatted_20_Text"><text:s text:c="4"/>│ <text:s text:c="4"/>Sec-WebSocket-Accept: &lt;hash&gt; <text:s text:c="12"/>│</text:p>
      <text:p text:style-name="Preformatted_20_Text"><text:s text:c="4"/>│ <text:s text:c="45"/>│</text:p>
      <text:p text:style-name="Preformatted_20_Text"><text:s text:c="4"/>│══════ Connexion WSS persistante ouverte ════ │</text:p>
      <text:p text:style-name="Preformatted_20_Text"><text:s text:c="4"/>│ <text:s text:c="45"/>│</text:p>
      <text:p text:style-name="Preformatted_20_Text"><text:s text:c="4"/>│──── Frame TEXT : HELLO ───────────────────&gt; │</text:p>
      <text:p text:style-name="Preformatted_20_Text"><text:s text:c="4"/>│&lt;─── Frame TEXT : HELLO_ACK ─────────────── <text:s/>│</text:p>
      <text:h text:style-name="Heading_20_3" text:outline-level="3">3.3 — Enveloppe de Message JSON (format canonique)</text:h>
      <text:p text:style-name="Text_20_body">Tous les messages transitent dans des frames WebSocket de type TEXT avec cette enveloppe commune :</text:p>
      <text:p text:style-name="Preformatted_20_Text">{</text:p>
      <text:p text:style-name="Preformatted_20_Text"><text:s text:c="2"/>"v": <text:s text:c="3"/>1,</text:p>
      <text:p text:style-name="Preformatted_20_Text"><text:s text:c="2"/>"type": "METRICS",</text:p>
      <text:p text:style-name="Preformatted_20_Text"><text:s text:c="2"/>"id": <text:s text:c="2"/>"01J2K...",</text:p>
      <text:p text:style-name="Preformatted_20_Text"><text:s text:c="2"/>"ts": <text:s text:c="2"/>1719230400123,</text:p>
      <text:p text:style-name="Preformatted_20_Text"><text:s text:c="2"/>"body": { ... }</text:p>
      <text:p text:style-name="Preformatted_20_Text">}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Champ</text:p>
          </table:table-cell>
          <table:table-cell table:style-name="Table1.A1" office:value-type="string">
            <text:p text:style-name="Table_20_Heading">Type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>
          <table:table-cell table:style-name="Table1.A1" office:value-type="string">
            <text:p text:style-name="Table_20_Contents"><text:span text:style-name="Source_20_Text">v</text:span>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Version du protocole (actuellement 1)</text:p>
          </table:table-cell>
        </table:table-row>
        <table:table-row>
          <table:table-cell table:style-name="Table1.A1" office:value-type="string">
            <text:p text:style-name="Table_20_Contents"><text:span text:style-name="Source_20_Text">type</text:span>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Type de message (voir catalogue ci-dessous)</text:p>
          </table:table-cell>
        </table:table-row>
        <table:table-row>
          <table:table-cell table:style-name="Table1.A1" office:value-type="string">
            <text:p text:style-name="Table_20_Contents"><text:span text:style-name="Source_20_Text">id</text:span>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UUID v7 généré par l'émetteur (pour ACK / corrélation)</text:p>
          </table:table-cell>
        </table:table-row>
        <table:table-row>
          <table:table-cell table:style-name="Table1.A1" office:value-type="string">
            <text:p text:style-name="Table_20_Contents"><text:span text:style-name="Source_20_Text">ts</text:span></text:p>
          </table:table-cell>
          <table:table-cell table:style-name="Table1.A1" office:value-type="string">
            <text:p text:style-name="Table_20_Contents">int64</text:p>
          </table:table-cell>
          <table:table-cell table:style-name="Table1.A1" office:value-type="string">
            <text:p text:style-name="Table_20_Contents">Timestamp Unix en millisecondes (émetteur)</text:p>
          </table:table-cell>
        </table:table-row>
        <table:table-row>
          <table:table-cell table:style-name="Table1.A1" office:value-type="string">
            <text:p text:style-name="Table_20_Contents"><text:span text:style-name="Source_20_Text">body</text:span></text:p>
          </table:table-cell>
          <table:table-cell table:style-name="Table1.A1" office:value-type="string">
            <text:p text:style-name="Table_20_Contents">object</text:p>
          </table:table-cell>
          <table:table-cell table:style-name="Table1.A1" office:value-type="string">
            <text:p text:style-name="Table_20_Contents">Payload spécifique au type de message</text:p>
          </table:table-cell>
        </table:table-row>
      </table:table>
      <text:h text:style-name="Heading_20_3" text:outline-level="3">3.4 — Catalogue des Types de Messages</text:h>
      <text:p text:style-name="Text_20_body"><text:span text:style-name="Strong_20_Emphasis">Agent → Backend :</text:span>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>
          <table:table-cell table:style-name="Table2.A1" office:value-type="string">
            <text:p text:style-name="Table_20_Heading">type</text:p>
          </table:table-cell>
          <table:table-cell table:style-name="Table2.A1" office:value-type="string">
            <text:p text:style-name="Table_20_Heading">Fréquence</text:p>
          </table:table-cell>
          <table:table-cell table:style-name="Table2.A1" office:value-type="string">
            <text:p text:style-name="Table_20_Heading">Description</text:p>
          </table:table-cell>
        </table:table-row>
        <table:table-row>
          <table:table-cell table:style-name="Table2.A1" office:value-type="string">
            <text:p text:style-name="Table_20_Contents"><text:span text:style-name="Source_20_Text">HELLO</text:span></text:p>
          </table:table-cell>
          <table:table-cell table:style-name="Table2.A1" office:value-type="string">
            <text:p text:style-name="Table_20_Contents">Une fois à la connexion</text:p>
          </table:table-cell>
          <table:table-cell table:style-name="Table2.A1" office:value-type="string">
            <text:p text:style-name="Table_20_Contents">Identification, version, OS</text:p>
          </table:table-cell>
        </table:table-row>
        <table:table-row>
          <table:table-cell table:style-name="Table2.A1" office:value-type="string">
            <text:p text:style-name="Table_20_Contents"><text:span text:style-name="Source_20_Text">HEARTBEAT</text:span></text:p>
          </table:table-cell>
          <table:table-cell table:style-name="Table2.A1" office:value-type="string">
            <text:p text:style-name="Table_20_Contents">Toutes les 30s</text:p>
          </table:table-cell>
          <table:table-cell table:style-name="Table2.A1" office:value-type="string">
            <text:p text:style-name="Table_20_Contents">Preuve de vie, numéro de séquence</text:p>
          </table:table-cell>
        </table:table-row>
        <table:table-row>
          <table:table-cell table:style-name="Table2.A1" office:value-type="string">
            <text:p text:style-name="Table_20_Contents"><text:span text:style-name="Source_20_Text">METRICS</text:span></text:p>
          </table:table-cell>
          <table:table-cell table:style-name="Table2.A1" office:value-type="string">
            <text:p text:style-name="Table_20_Contents">Toutes les 60s</text:p>
          </table:table-cell>
          <table:table-cell table:style-name="Table2.A1" office:value-type="string">
            <text:p text:style-name="Table_20_Contents">CPU / RAM / Disk / Net</text:p>
          </table:table-cell>
        </table:table-row>
        <table:table-row>
          <table:table-cell table:style-name="Table2.A1" office:value-type="string">
            <text:p text:style-name="Table_20_Contents"><text:span text:style-name="Source_20_Text">INVENTORY</text:span></text:p>
          </table:table-cell>
          <table:table-cell table:style-name="Table2.A1" office:value-type="string">
            <text:p text:style-name="Table_20_Contents">Sur demande ou toutes les 24h</text:p>
          </table:table-cell>
          <table:table-cell table:style-name="Table2.A1" office:value-type="string">
            <text:p text:style-name="Table_20_Contents">Inventaire HW/SW complet</text:p>
          </table:table-cell>
        </table:table-row>
        <table:table-row>
          <table:table-cell table:style-name="Table2.A1" office:value-type="string">
            <text:p text:style-name="Table_20_Contents"><text:span text:style-name="Source_20_Text">CMD_RESULT</text:span></text:p>
          </table:table-cell>
          <table:table-cell table:style-name="Table2.A1" office:value-type="string">
            <text:p text:style-name="Table_20_Contents">Après exécution</text:p>
          </table:table-cell>
          <table:table-cell table:style-name="Table2.A1" office:value-type="string">
            <text:p text:style-name="Table_20_Contents">Résultat d'une commande (stdout/stderr/exit_code)</text:p>
          </table:table-cell>
        </table:table-row>
        <table:table-row>
          <table:table-cell table:style-name="Table2.A1" office:value-type="string">
            <text:p text:style-name="Table_20_Contents"><text:span text:style-name="Source_20_Text">LOG</text:span></text:p>
          </table:table-cell>
          <table:table-cell table:style-name="Table2.A1" office:value-type="string">
            <text:p text:style-name="Table_20_Contents">Sur événement</text:p>
          </table:table-cell>
          <table:table-cell table:style-name="Table2.A1" office:value-type="string">
            <text:p text:style-name="Table_20_Contents">Erreur ou événement notable de l'agent</text:p>
          </table:table-cell>
        </table:table-row>
      </table:table>
      <text:p text:style-name="Text_20_body"><text:span text:style-name="Strong_20_Emphasis">Backend → Agent :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type</text:p>
          </table:table-cell>
          <table:table-cell table:style-name="Table3.A1" office:value-type="string">
            <text:p text:style-name="Table_20_Heading">Description</text:p>
          </table:table-cell>
        </table:table-row>
        <table:table-row>
          <table:table-cell table:style-name="Table3.A1" office:value-type="string">
            <text:p text:style-name="Table_20_Contents"><text:span text:style-name="Source_20_Text">HELLO_ACK</text:span></text:p>
          </table:table-cell>
          <table:table-cell table:style-name="Table3.A1" office:value-type="string">
            <text:p text:style-name="Table_20_Contents">Confirmation de session + paramètres serveur (fréquences, config)</text:p>
          </table:table-cell>
        </table:table-row>
        <table:table-row>
          <table:table-cell table:style-name="Table3.A1" office:value-type="string">
            <text:p text:style-name="Table_20_Contents"><text:span text:style-name="Source_20_Text">EXEC_SCRIPT</text:span></text:p>
          </table:table-cell>
          <table:table-cell table:style-name="Table3.A1" office:value-type="string">
            <text:p text:style-name="Table_20_Contents">Exécuter un script PS1 / Bash / CMD avec timeout</text:p>
          </table:table-cell>
        </table:table-row>
        <table:table-row>
          <table:table-cell table:style-name="Table3.A1" office:value-type="string">
            <text:p text:style-name="Table_20_Contents"><text:span text:style-name="Source_20_Text">INSTALL_PKG</text:span></text:p>
          </table:table-cell>
          <table:table-cell table:style-name="Table3.A1" office:value-type="string">
            <text:p text:style-name="Table_20_Contents">Installer un paquet (MSI / DEB / RPM) en mode silencieux</text:p>
          </table:table-cell>
        </table:table-row>
        <table:table-row>
          <table:table-cell table:style-name="Table3.A1" office:value-type="string">
            <text:p text:style-name="Table_20_Contents"><text:span text:style-name="Source_20_Text">COLLECT_INVENTORY</text:span></text:p>
          </table:table-cell>
          <table:table-cell table:style-name="Table3.A1" office:value-type="string">
            <text:p text:style-name="Table_20_Contents">Déclencher un inventaire immédiat</text:p>
          </table:table-cell>
        </table:table-row>
        <table:table-row>
          <table:table-cell table:style-name="Table3.A1" office:value-type="string">
            <text:p text:style-name="Table_20_Contents"><text:span text:style-name="Source_20_Text">REBOOT</text:span></text:p>
          </table:table-cell>
          <table:table-cell table:style-name="Table3.A1" office:value-type="string">
            <text:p text:style-name="Table_20_Contents">Redémarrage planifié ou immédiat</text:p>
          </table:table-cell>
        </table:table-row>
        <table:table-row>
          <table:table-cell table:style-name="Table3.A1" office:value-type="string">
            <text:p text:style-name="Table_20_Contents"><text:span text:style-name="Source_20_Text">PING</text:span></text:p>
          </table:table-cell>
          <table:table-cell table:style-name="Table3.A1" office:value-type="string">
            <text:p text:style-name="Table_20_Contents">Test de latence — l'agent répond PONG</text:p>
          </table:table-cell>
        </table:table-row>
        <table:table-row>
          <table:table-cell table:style-name="Table3.A1" office:value-type="string">
            <text:p text:style-name="Table_20_Contents"><text:span text:style-name="Source_20_Text">CONFIG_UPDATE</text:span></text:p>
          </table:table-cell>
          <table:table-cell table:style-name="Table3.A1" office:value-type="string">
            <text:p text:style-name="Table_20_Contents">Mise à jour des paramètres de l'agent (ex : fréquence métriques)</text:p>
          </table:table-cell>
        </table:table-row>
      </table:table>
      <text:h text:style-name="Heading_20_2" text:outline-level="2">4. Cycle de Vie Complet de l'Agent C</text:h>
      <text:h text:style-name="Heading_20_3" text:outline-level="3">4.1 — Phase d'Installation</text:h>
      <text:p text:style-name="Preformatted_20_Text">Administrateur MSP</text:p>
      <text:p text:style-name="Preformatted_20_Text"><text:s text:c="6"/>│</text:p>
      <text:p text:style-name="Preformatted_20_Text"><text:s text:c="6"/>▼</text:p>
      <text:p text:style-name="Preformatted_20_Text">┌─────────────────────────────────────────────────────────┐</text:p>
      <text:p text:style-name="Preformatted_20_Text">│ <text:s/>Console Web : génère un "Enrollment Package" <text:s text:c="10"/>│</text:p>
      <text:p text:style-name="Preformatted_20_Text">│ <text:s text:c="56"/>│</text:p>
      <text:p text:style-name="Preformatted_20_Text">│ <text:s/>Contenu du package : <text:s text:c="34"/>│</text:p>
      <text:p text:style-name="Preformatted_20_Text">│ <text:s/>├── Binaire agent (leo-agent.exe / leo-agent) <text:s text:c="9"/>│</text:p>
      <text:p text:style-name="Preformatted_20_Text">│ <text:s/>├── Fichier de config initial (agent_bootstrap.conf) <text:s text:c="2"/>│</text:p>
      <text:p text:style-name="Preformatted_20_Text">│ <text:s/>│ <text:s text:c="2"/>├── server_url: wss://rmm.example.com/agent <text:s text:c="7"/>│</text:p>
      <text:p text:style-name="Preformatted_20_Text">│ <text:s/>│ <text:s text:c="2"/>├── enrollment_token: &lt;JWT one-shot, TTL 24h&gt; <text:s text:c="5"/>│</text:p>
      <text:p text:style-name="Preformatted_20_Text">│ <text:s/>│ <text:s text:c="2"/>└── ca_fingerprint: &lt;SHA-256 du certificat CA&gt; <text:s text:c="4"/>│</text:p>
      <text:p text:style-name="Preformatted_20_Text">│ <text:s/>└── Script d'installation (install.ps1 / install.sh) <text:s/>│</text:p>
      <text:p text:style-name="Preformatted_20_Text">└─────────────────────────────────────────────────────────┘</text:p>
      <text:p text:style-name="Preformatted_20_Text"><text:s text:c="6"/>│</text:p>
      <text:p text:style-name="Preformatted_20_Text"><text:s text:c="6"/>▼ <text:s/>Exécuté sur la machine cible</text:p>
      <text:p text:style-name="Preformatted_20_Text">┌─────────────────────────────────────────────────────────┐</text:p>
      <text:p text:style-name="Preformatted_20_Text">│ <text:s/>Script d'installation <text:s text:c="33"/>│</text:p>
      <text:p text:style-name="Preformatted_20_Text">│ <text:s/>1. Copie le binaire dans le répertoire système <text:s text:c="8"/>│</text:p>
      <text:p text:style-name="Preformatted_20_Text">│ <text:s text:c="4"/>Windows : C:\Program Files\LeoOne\agent\ <text:s text:c="11"/>│</text:p>
      <text:p text:style-name="Preformatted_20_Text">│ <text:s text:c="4"/>Linux <text:s text:c="2"/>: /opt/leo-one/agent/ <text:s text:c="22"/>│</text:p>
      <text:p text:style-name="Preformatted_20_Text">│ <text:s text:c="4"/>macOS <text:s text:c="2"/>: /Library/Application Support/LeoOne/ <text:s text:c="5"/>│</text:p>
      <text:p text:style-name="Preformatted_20_Text">│ <text:s/>2. Installe le service système <text:s text:c="24"/>│</text:p>
      <text:p text:style-name="Preformatted_20_Text">│ <text:s text:c="4"/>Windows : sc.exe create LeoOneAgent ... <text:s text:c="12"/>│</text:p>
      <text:p text:style-name="Preformatted_20_Text">│ <text:s text:c="4"/>Linux <text:s text:c="2"/>: systemd unit file <text:s text:c="24"/>│</text:p>
      <text:p text:style-name="Preformatted_20_Text">│ <text:s text:c="4"/>macOS <text:s text:c="2"/>: launchd plist <text:s text:c="28"/>│</text:p>
      <text:p text:style-name="Preformatted_20_Text">│ <text:s/>3. Démarre le service → première exécution <text:s text:c="12"/>│</text:p>
      <text:p text:style-name="Preformatted_20_Text">└─────────────────────────────────────────────────────────┘</text:p>
      <text:h text:style-name="Heading_20_3" text:outline-level="3">4.2 — Phase d'Enregistrement (Enrollment — une seule fois)</text:h>
      <text:p text:style-name="Preformatted_20_Text">Agent C (1er démarrage) <text:s text:c="20"/>Backend Go</text:p>
      <text:p text:style-name="Preformatted_20_Text"><text:s text:c="8"/>│ <text:s text:c="39"/>│</text:p>
      <text:p text:style-name="Preformatted_20_Text"><text:s text:c="8"/>│ <text:s/>1. Lecture de agent_bootstrap.conf <text:s text:c="4"/>│</text:p>
      <text:p text:style-name="Preformatted_20_Text"><text:s text:c="8"/>│ <text:s/>2. Détecte absence de agent.uuid <text:s text:c="6"/>│</text:p>
      <text:p text:style-name="Preformatted_20_Text"><text:s text:c="8"/>│ <text:s/>3. Génère paire de clés RSA-4096 <text:s text:c="6"/>│</text:p>
      <text:p text:style-name="Preformatted_20_Text"><text:s text:c="8"/>│ <text:s text:c="4"/>→ private_key.pem (stocké local) <text:s text:c="2"/>│</text:p>
      <text:p text:style-name="Preformatted_20_Text"><text:s text:c="8"/>│ <text:s text:c="4"/>→ public_key.pem <text:s text:c="18"/>│</text:p>
      <text:p text:style-name="Preformatted_20_Text"><text:s text:c="8"/>│ <text:s text:c="39"/>│</text:p>
      <text:p text:style-name="Preformatted_20_Text"><text:s text:c="8"/>│ <text:s/>4. Collecte Hardware ID : <text:s text:c="13"/>│</text:p>
      <text:p text:style-name="Preformatted_20_Text"><text:s text:c="8"/>│ <text:s text:c="4"/>- UUID BIOS/UEFI (Windows: WMI) <text:s text:c="3"/>│</text:p>
      <text:p text:style-name="Preformatted_20_Text"><text:s text:c="8"/>│ <text:s text:c="4"/>- /etc/machine-id (Linux) <text:s text:c="10"/>│</text:p>
      <text:p text:style-name="Preformatted_20_Text"><text:s text:c="8"/>│ <text:s text:c="4"/>- IOPlatformUUID (macOS) <text:s text:c="11"/>│</text:p>
      <text:p text:style-name="Preformatted_20_Text"><text:s text:c="8"/>│ <text:s text:c="39"/>│</text:p>
      <text:p text:style-name="Preformatted_20_Text"><text:s text:c="8"/>│──── HTTPS POST /api/v1/enroll ────────&gt;│</text:p>
      <text:p text:style-name="Preformatted_20_Text"><text:s text:c="8"/>│ <text:s text:c="4"/>{ <text:s text:c="33"/>│</text:p>
      <text:p text:style-name="Preformatted_20_Text"><text:s text:c="8"/>│ <text:s text:c="6"/>"enrollment_token": "...", <text:s text:c="7"/>│</text:p>
      <text:p text:style-name="Preformatted_20_Text"><text:s text:c="8"/>│ <text:s text:c="6"/>"public_key": "&lt;PEM&gt;", <text:s text:c="10"/>│</text:p>
      <text:p text:style-name="Preformatted_20_Text"><text:s text:c="8"/>│ <text:s text:c="6"/>"hostname": "PC-DUPONT", <text:s text:c="9"/>│</text:p>
      <text:p text:style-name="Preformatted_20_Text"><text:s text:c="8"/>│ <text:s text:c="6"/>"os": "Windows 11 23H2", <text:s text:c="8"/>│</text:p>
      <text:p text:style-name="Preformatted_20_Text"><text:s text:c="8"/>│ <text:s text:c="6"/>"arch": "amd64", <text:s text:c="16"/>│</text:p>
      <text:p text:style-name="Preformatted_20_Text"><text:s text:c="8"/>│ <text:s text:c="6"/>"hardware_id": "&lt;UUID BIOS&gt;" <text:s text:c="4"/>│</text:p>
      <text:p text:style-name="Preformatted_20_Text"><text:s text:c="8"/>│ <text:s text:c="4"/>} <text:s text:c="33"/>│</text:p>
      <text:p text:style-name="Preformatted_20_Text"><text:s text:c="8"/>│ <text:s text:c="39"/>│</text:p>
      <text:p text:style-name="Preformatted_20_Text"><text:s text:c="8"/>│&lt;─── 201 Created ───────────────────── <text:s/>│</text:p>
      <text:p text:style-name="Preformatted_20_Text"><text:s text:c="8"/>│ <text:s text:c="4"/>{ <text:s text:c="33"/>│</text:p>
      <text:p text:style-name="Preformatted_20_Text"><text:s text:c="8"/>│ <text:s text:c="6"/>"agent_id": "&lt;UUID v4&gt;", <text:s text:c="9"/>│</text:p>
      <text:p text:style-name="Preformatted_20_Text"><text:s text:c="8"/>│ <text:s text:c="6"/>"tenant_id": "&lt;UUID v4&gt;", <text:s text:c="8"/>│</text:p>
      <text:p text:style-name="Preformatted_20_Text"><text:s text:c="8"/>│ <text:s text:c="6"/>"client_cert": "&lt;PEM signé CA&gt;", │</text:p>
      <text:p text:style-name="Preformatted_20_Text"><text:s text:c="8"/>│ <text:s text:c="6"/>"ws_endpoint": "wss://..." <text:s text:c="7"/>│</text:p>
      <text:p text:style-name="Preformatted_20_Text"><text:s text:c="8"/>│ <text:s text:c="4"/>} <text:s text:c="33"/>│</text:p>
      <text:p text:style-name="Preformatted_20_Text"><text:s text:c="8"/>│ <text:s text:c="39"/>│</text:p>
      <text:p text:style-name="Preformatted_20_Text"><text:s text:c="8"/>│ <text:s/>5. Stocke dans agent.conf : <text:s text:c="11"/>│</text:p>
      <text:p text:style-name="Preformatted_20_Text"><text:s text:c="8"/>│ <text:s text:c="4"/>- agent_id, tenant_id <text:s text:c="13"/>│</text:p>
      <text:p text:style-name="Preformatted_20_Text"><text:s text:c="8"/>│ <text:s text:c="4"/>- client_cert.pem <text:s text:c="17"/>│</text:p>
      <text:p text:style-name="Preformatted_20_Text"><text:s text:c="8"/>│ <text:s/>6. Supprime enrollment_token <text:s text:c="9"/>│</text:p>
      <text:p text:style-name="Preformatted_20_Text"><text:s text:c="8"/>│ <text:s/>7. Supprime agent_bootstrap.conf <text:s text:c="5"/>│</text:p>
      <text:p text:style-name="Preformatted_20_Text"><text:s text:c="8"/>│ <text:s/>→ Passe en boucle de monitoring <text:s text:c="6"/>│</text:p>
      <text:p text:style-name="P3"><text:span text:style-name="Strong_20_Emphasis"><text:span text:style-name="T1">Sécurité de l'enrollment :</text:span></text:span><text:span text:style-name="T1"> le </text:span><text:span text:style-name="Source_20_Text"><text:span text:style-name="T1">enrollment_token</text:span></text:span><text:span text:style-name="T1"> est un JWT signé, à usage unique (invalidé côté backend dès la première utilisation), avec TTL de 24h. Il ne peut pas servir à enregistrer deux agents différents. </text:span></text:p>
      <text:h text:style-name="Heading_20_3" text:outline-level="3">4.3 — Boucle Principale de Monitoring (état nominal)</text:h>
      <text:p text:style-name="Preformatted_20_Text">Démarrage du service</text:p>
      <text:p text:style-name="Preformatted_20_Text"><text:s text:c="5"/>│</text:p>
      <text:p text:style-name="Preformatted_20_Text"><text:s text:c="5"/>▼</text:p>
      <text:p text:style-name="Preformatted_20_Text">Lecture de agent.conf ──── absent/corrompu ──&gt; Log erreur critique + exit</text:p>
      <text:p text:style-name="Preformatted_20_Text"/>
      <text:p text:style-name="Preformatted_20_Text"><text:s text:c="5"/>│</text:p>
      <text:p text:style-name="Preformatted_20_Text"><text:s text:c="5"/>▼</text:p>
      <text:p text:style-name="Preformatted_20_Text">┌──────────────────────────────────────────────────────────┐</text:p>
      <text:p text:style-name="Preformatted_20_Text">│ <text:s/>CONNEXION (avec reconnexion à backoff exponentiel) <text:s text:c="5"/>│</text:p>
      <text:p text:style-name="Preformatted_20_Text">│ <text:s/>1. Ouverture socket TCP → server:443 <text:s text:c="19"/>│</text:p>
      <text:p text:style-name="Preformatted_20_Text">│ <text:s/>2. TLS 1.3 Handshake mTLS (présente client_cert.pem) <text:s text:c="2"/>│</text:p>
      <text:p text:style-name="Preformatted_20_Text">│ <text:s/>3. Vérification CA pinné (ca_fingerprint SHA-256) <text:s text:c="6"/>│</text:p>
      <text:p text:style-name="Preformatted_20_Text">│ <text:s/>4. HTTP Upgrade → WebSocket <text:s text:c="28"/>│</text:p>
      <text:p text:style-name="Preformatted_20_Text">│ <text:s/>5. Envoi message HELLO <text:s text:c="33"/>│</text:p>
      <text:p text:style-name="Preformatted_20_Text">│ <text:s/>6. Réception HELLO_ACK + paramètres serveur <text:s text:c="12"/>│</text:p>
      <text:p text:style-name="Preformatted_20_Text">└──────────────────────────────────────────────────────────┘</text:p>
      <text:p text:style-name="Preformatted_20_Text"><text:s text:c="5"/>│ Connecté</text:p>
      <text:p text:style-name="Preformatted_20_Text"><text:s text:c="5"/>▼</text:p>
      <text:p text:style-name="Preformatted_20_Text">┌──────────────────────────────────────────────────────────┐</text:p>
      <text:p text:style-name="Preformatted_20_Text">│ <text:s/>THREADS PARALLÈLES <text:s text:c="37"/>│</text:p>
      <text:p text:style-name="Preformatted_20_Text">│ <text:s text:c="57"/>│</text:p>
      <text:p text:style-name="Preformatted_20_Text">│ <text:s/>Thread 1 — HEARTBEAT (toutes les 30 secondes) <text:s text:c="9"/>│</text:p>
      <text:p text:style-name="Preformatted_20_Text">│ <text:s text:c="3"/>{ "type":"HEARTBEAT", "ts":&lt;unix_ms&gt;, "seq":&lt;n&gt; } <text:s text:c="2"/>│</text:p>
      <text:p text:style-name="Preformatted_20_Text">│ <text:s text:c="57"/>│</text:p>
      <text:p text:style-name="Preformatted_20_Text">│ <text:s/>Thread 2 — MÉTRIQUES (toutes les 60 secondes) <text:s text:c="9"/>│</text:p>
      <text:p text:style-name="Preformatted_20_Text">│ <text:s text:c="3"/>Collecte : <text:s text:c="43"/>│</text:p>
      <text:p text:style-name="Preformatted_20_Text">│ <text:s text:c="4"/>• CPU <text:s/>: usage global + par cœur (%) <text:s text:c="15"/>│</text:p>
      <text:p text:style-name="Preformatted_20_Text">│ <text:s text:c="4"/>• RAM <text:s/>: total / utilisé / disponible (bytes) <text:s text:c="7"/>│</text:p>
      <text:p text:style-name="Preformatted_20_Text">│ <text:s text:c="4"/>• Disk : par volume/partition (total/used/free) <text:s text:c="5"/>│</text:p>
      <text:p text:style-name="Preformatted_20_Text">│ <text:s text:c="4"/>• Net <text:s/>: bytes_in/out par interface réseau <text:s text:c="10"/>│</text:p>
      <text:p text:style-name="Preformatted_20_Text">│ <text:s text:c="4"/>• Procs: top 10 par consommation CPU <text:s text:c="15"/>│</text:p>
      <text:p text:style-name="Preformatted_20_Text">│ <text:s text:c="3"/>Envoi payload JSON <text:s text:c="35"/>│</text:p>
      <text:p text:style-name="Preformatted_20_Text">│ <text:s text:c="57"/>│</text:p>
      <text:p text:style-name="Preformatted_20_Text">│ <text:s/>Thread 3 — RÉCEPTION COMMANDES (écoute permanente) <text:s text:c="4"/>│</text:p>
      <text:p text:style-name="Preformatted_20_Text">│ <text:s text:c="3"/>Traite : EXEC_SCRIPT, INSTALL_PKG, REBOOT, <text:s text:c="10"/>│</text:p>
      <text:p text:style-name="Preformatted_20_Text">│ <text:s text:c="12"/>COLLECT_INVENTORY, PING, CONFIG_UPDATE <text:s text:c="6"/>│</text:p>
      <text:p text:style-name="Preformatted_20_Text">└──────────────────────────────────────────────────────────┘</text:p>
      <text:p text:style-name="Preformatted_20_Text"><text:s text:c="5"/>│ Déconnexion / Erreur réseau</text:p>
      <text:p text:style-name="Preformatted_20_Text"><text:s text:c="5"/>▼</text:p>
      <text:p text:style-name="Preformatted_20_Text">┌──────────────────────────────┐</text:p>
      <text:p text:style-name="Preformatted_20_Text">│ <text:s/>Backoff exponentiel <text:s text:c="8"/>│</text:p>
      <text:p text:style-name="Preformatted_20_Text"><text:soft-page-break/>│ <text:s/>Tentative 1 : <text:s/>5s <text:s text:c="10"/>│</text:p>
      <text:p text:style-name="Preformatted_20_Text">│ <text:s/>Tentative 2 : 10s <text:s text:c="10"/>│</text:p>
      <text:p text:style-name="Preformatted_20_Text">│ <text:s/>Tentative 3 : 30s <text:s text:c="10"/>│</text:p>
      <text:p text:style-name="Preformatted_20_Text">│ <text:s/>Tentative 4+: 60s (max) <text:s text:c="3"/>│</text:p>
      <text:p text:style-name="Preformatted_20_Text">└──────────────────────────────┘</text:p>
      <text:p text:style-name="Preformatted_20_Text"><text:s text:c="5"/>│ Reconnexion réussie → retour boucle principale</text:p>
      <text:h text:style-name="Heading_20_3" text:outline-level="3">4.4 — Stockage Local de l'Agent</text:h>
      <text:p text:style-name="Preformatted_20_Text">Windows : C:\ProgramData\LeoOne\</text:p>
      <text:p text:style-name="Preformatted_20_Text">├── agent.conf <text:s text:c="11"/>← config permanente (agent_id, tenant_id, endpoint)</text:p>
      <text:p text:style-name="Preformatted_20_Text">├── certs\</text:p>
      <text:p text:style-name="Preformatted_20_Text">│ <text:s text:c="2"/>├── client_cert.pem <text:s text:c="2"/>← certificat signé par le CA backend</text:p>
      <text:p text:style-name="Preformatted_20_Text">│ <text:s text:c="2"/>├── client_key.pem <text:s text:c="3"/>← clé privée locale (permissions restreintes)</text:p>
      <text:p text:style-name="Preformatted_20_Text">│ <text:s text:c="2"/>└── ca.fingerprint <text:s text:c="3"/>← hash SHA-256 du CA pour certificate pinning</text:p>
      <text:p text:style-name="Preformatted_20_Text">└── logs\</text:p>
      <text:p text:style-name="Preformatted_20_Text"><text:s text:c="4"/>└── agent.log <text:s text:c="8"/>← rotation 7 jours, 10 MB max par fichier</text:p>
      <text:p text:style-name="Preformatted_20_Text"/>
      <text:p text:style-name="Preformatted_20_Text">Linux / macOS : /opt/leo-one/ <text:s/>(même structure)</text:p>
      <text:p text:style-name="P3"><text:span text:style-name="Strong_20_Emphasis"><text:span text:style-name="T1">Sécurité locale :</text:span></text:span><text:span text:style-name="T1"> </text:span><text:span text:style-name="Source_20_Text"><text:span text:style-name="T1">client_key.pem</text:span></text:span><text:span text:style-name="T1"> est lisible uniquement par l'utilisateur système dédié (</text:span><text:span text:style-name="Source_20_Text"><text:span text:style-name="T1">leo-agent</text:span></text:span><text:span text:style-name="T1"> sur Linux/macOS, </text:span><text:span text:style-name="Source_20_Text"><text:span text:style-name="T1">NT AUTHORITY\SYSTEM</text:span></text:span><text:span text:style-name="T1"> sur Windows). Les permissions sont vérifiées au démarrage — si elles sont incorrectes, l'agent refuse de démarrer et écrit une erreur critique dans le log. </text:span></text:p>
      <text:h text:style-name="Heading_20_2" text:outline-level="2">5. Récapitulatif des Décisions Architecturale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Heading">Élément</text:p>
          </table:table-cell>
          <table:table-cell table:style-name="Table4.A1" office:value-type="string">
            <text:p text:style-name="Table_20_Heading">Décision retenue</text:p>
          </table:table-cell>
        </table:table-row>
        <table:table-row>
          <table:table-cell table:style-name="Table4.A1" office:value-type="string">
            <text:p text:style-name="Table_20_Contents">Protocole Agent ↔ Backend</text:p>
          </table:table-cell>
          <table:table-cell table:style-name="Table4.A1" office:value-type="string">
            <text:p text:style-name="Table_20_Contents">WebSocket Secure (WSS)</text:p>
          </table:table-cell>
        </table:table-row>
        <table:table-row>
          <table:table-cell table:style-name="Table4.A1" office:value-type="string">
            <text:p text:style-name="Table_20_Contents">Sécurité transport</text:p>
          </table:table-cell>
          <table:table-cell table:style-name="Table4.A1" office:value-type="string">
            <text:p text:style-name="Table_20_Contents">TLS 1.3 obligatoire, mTLS pour les agents</text:p>
          </table:table-cell>
        </table:table-row>
        <table:table-row>
          <table:table-cell table:style-name="Table4.A1" office:value-type="string">
            <text:p text:style-name="Table_20_Contents">Suite cryptographique</text:p>
          </table:table-cell>
          <table:table-cell table:style-name="Table4.A1" office:value-type="string">
            <text:p text:style-name="Table_20_Contents">TLS_AES_256_GCM_SHA384</text:p>
          </table:table-cell>
        </table:table-row>
        <table:table-row>
          <table:table-cell table:style-name="Table4.A1" office:value-type="string">
            <text:p text:style-name="Table_20_Contents">Authentification agent</text:p>
          </table:table-cell>
          <table:table-cell table:style-name="Table4.A1" office:value-type="string">
            <text:p text:style-name="Table_20_Contents">Certificat client signé par CA interne (post-enrollment)</text:p>
          </table:table-cell>
        </table:table-row>
        <table:table-row>
          <table:table-cell table:style-name="Table4.A1" office:value-type="string">
            <text:p text:style-name="Table_20_Contents">Authentification initiale</text:p>
          </table:table-cell>
          <table:table-cell table:style-name="Table4.A1" office:value-type="string">
            <text:p text:style-name="Table_20_Contents">Enrollment token JWT one-shot (TTL 24h, usage unique)</text:p>
          </table:table-cell>
        </table:table-row>
        <table:table-row>
          <table:table-cell table:style-name="Table4.A1" office:value-type="string">
            <text:p text:style-name="Table_20_Contents">Identifiant machine</text:p>
          </table:table-cell>
          <table:table-cell table:style-name="Table4.A1" office:value-type="string">
            <text:p text:style-name="Table_20_Contents">UUID BIOS/UEFI (Windows: WMI) · /etc/machine-id (Linux) · IOPlatformUUID (macOS)</text:p>
          </table:table-cell>
        </table:table-row>
        <table:table-row>
          <table:table-cell table:style-name="Table4.A1" office:value-type="string">
            <text:p text:style-name="Table_20_Contents">Isolation multi-tenant</text:p>
          </table:table-cell>
          <table:table-cell table:style-name="Table4.A1" office:value-type="string">
            <text:p text:style-name="Table_20_Contents">tenant_id sur toutes les entités, validé en middleware Go</text:p>
          </table:table-cell>
        </table:table-row>
        <table:table-row>
          <table:table-cell table:style-name="Table4.A1" office:value-type="string">
            <text:p text:style-name="Table_20_Contents">Fréquence heartbeat</text:p>
          </table:table-cell>
          <table:table-cell table:style-name="Table4.A1" office:value-type="string">
            <text:p text:style-name="Table_20_Contents">30 secondes</text:p>
          </table:table-cell>
        </table:table-row>
        <table:table-row>
          <table:table-cell table:style-name="Table4.A1" office:value-type="string">
            <text:p text:style-name="Table_20_Contents">Fréquence métriques</text:p>
          </table:table-cell>
          <table:table-cell table:style-name="Table4.A1" office:value-type="string">
            <text:p text:style-name="Table_20_Contents">60 secondes (configurable par tenant via CONFIG_UPDATE)</text:p>
          </table:table-cell>
        </table:table-row>
        <table:table-row>
          <table:table-cell table:style-name="Table4.A1" office:value-type="string">
            <text:p text:style-name="Table_20_Contents">Reconnexion agent</text:p>
          </table:table-cell>
          <table:table-cell table:style-name="Table4.A1" office:value-type="string">
            <text:p text:style-name="Table_20_Contents">Backoff exponentiel — cap à 60 secondes</text:p>
          </table:table-cell>
        </table:table-row>
        <table:table-row>
          <table:table-cell table:style-name="Table4.A1" office:value-type="string">
            <text:p text:style-name="Table_20_Contents">Format des messages</text:p>
          </table:table-cell>
          <table:table-cell table:style-name="Table4.A1" office:value-type="string">
            <text:p text:style-name="Table_20_Contents">JSON canonique avec enveloppe v / type / id / ts / body</text:p>
          </table:table-cell>
        </table:table-row>
        <table:table-row>
          <table:table-cell table:style-name="Table4.A1" office:value-type="string">
            <text:p text:style-name="Table_20_Contents">Stockage local agent</text:p>
          </table:table-cell>
          <table:table-cell table:style-name="Table4.A1" office:value-type="string">
            <text:p text:style-name="Table_20_Contents">Fichiers avec permissions OS restrictives, rotation logs 7j/10MB</text:p>
          </table:table-cell>
        </table:table-row>
      </table:table>
      <text:p text:style-name="P9"/>
      <text:p text:style-name="Horizontal_20_Line"/>
      <text:p text:style-name="P10">Leo-One RMM — Document Phase 1 — Confidentie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fr" fo:country="FR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.499cm" fo:margin-right="2.499cm" fo:margin-top="2.499cm" fo:margin-bottom="2.499cm" style:contextual-spacing="false"/>
      <style:text-properties fo:color="#1a1a1a" loext:opacity="100%" style:font-name="Arial" fo:font-family="Arial, sans-serif" fo:font-size="11pt" style:font-name-asian="Arial" style:font-family-asian="Arial, sans-serif" style:font-size-asian="11pt" style:font-name-complex="Arial" style:font-family-complex="Arial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padding-left="0cm" fo:padding-right="0cm" fo:padding-top="0cm" fo:padding-bottom="0.212cm" fo:border-left="none" fo:border-right="none" fo:border-top="none" fo:border-bottom="2.24pt solid #1e3a5f"/>
      <style:text-properties fo:color="#1e3a5f" loext:opacity="100%" style:font-name="Noto Sans" fo:font-family="'Noto Sans'" style:font-pitch="variable" fo:font-size="20pt" fo:font-weight="bold" style:font-size-asian="20pt" style:font-weight-asian="bold" style:font-size-complex="2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60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847cm" fo:margin-bottom="0.212cm" style:contextual-spacing="false" fo:padding-left="0cm" fo:padding-right="0cm" fo:padding-top="0cm" fo:padding-bottom="0.106cm" fo:border-left="none" fo:border-right="none" fo:border-top="none" fo:border-bottom="0.06pt solid #aac4e0"/>
      <style:text-properties fo:color="#1e3a5f" loext:opacity="100%" style:font-name="Liberation Serif" fo:font-family="'Liberation Serif'" style:font-family-generic="roman" style:font-pitch="variable" fo:font-size="15pt" fo:font-weight="bold" style:font-name-asian="Noto Serif CJK SC" style:font-family-asian="'Noto Serif CJK SC'" style:font-family-generic-asian="system" style:font-pitch-asian="variable" style:font-size-asian="15pt" style:font-weight-asian="bold" style:font-name-complex="Noto Sans Devanagari1" style:font-family-complex="'Noto Sans Devanagari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529cm" fo:margin-bottom="0.212cm" style:contextual-spacing="false"/>
      <style:text-properties fo:color="#2c5f8a" loext:opacity="100%"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265cm" fo:margin-right="0.265cm" fo:margin-top="0.265cm" fo:margin-bottom="0.265cm" style:contextual-spacing="false" fo:line-height="150%" fo:padding-left="0.318cm" fo:padding-right="0cm" fo:padding-top="0.318cm" fo:padding-bottom="0.318cm" fo:border-left="0.06pt solid #d0d7e2" fo:border-right="none" fo:border-top="0.06pt solid #d0d7e2" fo:border-bottom="0.06pt solid #d0d7e2"/>
      <style:text-properties style:font-name="Courier New" fo:font-family="'Courier New', monospace" fo:font-size="9pt" style:font-name-asian="Courier New" style:font-family-asian="'Courier New', monospace" style:font-size-asian="9pt" style:font-name-complex="Courier New" style:font-family-complex="'Courier New', monospace" style:font-size-complex="9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ffffff" loext:opacity="100%"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, monospace" fo:font-size="9pt" fo:background-color="#f4f6f9" style:font-name-asian="Courier New" style:font-family-asian="'Courier New', monospace" style:font-size-asian="9pt" style:font-name-complex="Courier New" style:font-family-complex="'Courier New', monospace" style:font-size-complex="9pt" loext:padding-left="0.318cm" loext:padding-right="0cm" loext:padding-top="0.318cm" loext:padding-bottom="0.318cm" loext:border-left="0.06pt solid #d0d7e2" loext:border-right="none" loext:border-top="0.06pt solid #d0d7e2" loext:border-bottom="0.06pt solid #d0d7e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eo-One RMM — Phase 1 : Architecture Globale</dc:title>
    <meta:document-statistic meta:table-count="4" meta:image-count="0" meta:object-count="0" meta:page-count="3" meta:paragraph-count="322" meta:word-count="1775" meta:character-count="15264" meta:non-whitespace-character-count="9697"/>
    <meta:generator>LibreOffice/24.2.7.2$Linux_X86_64 LibreOffice_project/420$Build-2</meta:generator>
    <meta:user-defined meta:name=""/>
  </office:meta>
</office:document-meta>
</file>