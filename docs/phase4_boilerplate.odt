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cm" table:align="left"/>
    </style:style>
    <style:style style:name="Table1.A" style:family="table-column">
      <style:table-column-properties style:column-width="5.519cm"/>
    </style:style>
    <style:style style:name="Table1.B" style:family="table-column">
      <style:table-column-properties style:column-width="5.177cm"/>
    </style:style>
    <style:style style:name="Table1.C" style:family="table-column">
      <style:table-column-properties style:column-width="7.3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cm" table:align="left"/>
    </style:style>
    <style:style style:name="Table2.A" style:family="table-column">
      <style:table-column-properties style:column-width="5.708cm"/>
    </style:style>
    <style:style style:name="Table2.B" style:family="table-column">
      <style:table-column-properties style:column-width="5.092cm"/>
    </style:style>
    <style:style style:name="Table2.C" style:family="table-column">
      <style:table-column-properties style:column-width="7.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center" style:justify-single-word="false"/>
    </style:style>
    <style:style style:name="P2" style:family="paragraph" style:parent-style-name="Heading_20_1" style:master-page-name="HTML">
      <style:paragraph-properties fo:margin-left="0cm" fo:margin-right="0cm" fo:text-align="center" style:justify-single-word="false" fo:text-indent="0cm" style:auto-text-indent="false" style:page-number="auto"/>
      <style:text-properties loext:padding="0cm" loext:border="none"/>
    </style:style>
    <style:style style:name="P3" style:family="paragraph" style:parent-style-name="Text_20_body">
      <style:paragraph-properties fo:margin-left="0.318cm" fo:margin-right="0.318cm" fo:margin-top="0.318cm" fo:margin-bottom="0.318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2c5f8a" loext:opacity="100%" fo:font-size="15pt" fo:font-weight="bold" loext:padding="0cm" loext:border="none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444444" loext:opacity="100%" fo:font-size="14pt" loext:padding="0cm" loext:border="non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666666" loext:opacity="100%" fo:font-size="10pt" loext:padding="0cm" loext:border="non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888888" loext:opacity="100%" fo:font-size="9pt"/>
    </style:style>
    <style:style style:name="T1" style:family="text">
      <style:text-properties fo:font-size="10pt" fo:background-color="#fff8e1" loext:char-shading-value="0" loext:padding-left="0.37cm" loext:padding-right="0cm" loext:padding-top="0cm" loext:padding-bottom="0cm" loext:border-left="3pt solid #f0a500" loext:border-right="none" loext:border-top="none" loext:border-botto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-One RMM</text:p>
      <text:p text:style-name="P4">Alternative moderne à Action1, NinjaOne, ConnectWise Automate</text:p>
      <text:p text:style-name="P1"/>
      <text:p text:style-name="P5">PHASE 4 — Boilerplate Agent C &amp; Serveur Go (Gestionnaire de Connexion)</text:p>
      <text:p text:style-name="P6">2 233 lignes de code de production écrites · 24 juin 2026</text:p>
      <text:p text:style-name="Horizontal_20_Line"/>
      <text:h text:style-name="Heading_20_2" text:outline-level="2">1. Fichiers créés — Agent C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Fichier</text:p>
          </table:table-cell>
          <table:table-cell table:style-name="Table1.A1" office:value-type="string">
            <text:p text:style-name="Table_20_Heading">Rôle</text:p>
          </table:table-cell>
          <table:table-cell table:style-name="Table1.A1" office:value-type="string">
            <text:p text:style-name="Table_20_Heading">Points clés</text:p>
          </table:table-cell>
        </table:table-row>
        <table:table-row>
          <table:table-cell table:style-name="Table1.A1" office:value-type="string">
            <text:p text:style-name="Table_20_Contents">include/leo_agent.h</text:p>
          </table:table-cell>
          <table:table-cell table:style-name="Table1.A1" office:value-type="string">
            <text:p text:style-name="Table_20_Contents">Header global</text:p>
          </table:table-cell>
          <table:table-cell table:style-name="Table1.A1" office:value-type="string">
            <text:p text:style-name="Table_20_Contents">Tous les types, constantes, enums du protocole</text:p>
          </table:table-cell>
        </table:table-row>
        <table:table-row>
          <table:table-cell table:style-name="Table1.A1" office:value-type="string">
            <text:p text:style-name="Table_20_Contents">src/logger.c/h</text:p>
          </table:table-cell>
          <table:table-cell table:style-name="Table1.A1" office:value-type="string">
            <text:p text:style-name="Table_20_Contents">Logger thread-safe</text:p>
          </table:table-cell>
          <table:table-cell table:style-name="Table1.A1" office:value-type="string">
            <text:p text:style-name="Table_20_Contents">Mutex interne, rotation fichier, 5 niveaux</text:p>
          </table:table-cell>
        </table:table-row>
        <table:table-row>
          <table:table-cell table:style-name="Table1.A1" office:value-type="string">
            <text:p text:style-name="Table_20_Contents">src/config.c/h</text:p>
          </table:table-cell>
          <table:table-cell table:style-name="Table1.A1" office:value-type="string">
            <text:p text:style-name="Table_20_Contents">Configuration INI</text:p>
          </table:table-cell>
          <table:table-cell table:style-name="Table1.A1" office:value-type="string">
            <text:p text:style-name="Table_20_Contents">Lecture/écriture agent.conf, validation</text:p>
          </table:table-cell>
        </table:table-row>
        <table:table-row>
          <table:table-cell table:style-name="Table1.A1" office:value-type="string">
            <text:p text:style-name="Table_20_Contents">src/protocol.c/h</text:p>
          </table:table-cell>
          <table:table-cell table:style-name="Table1.A1" office:value-type="string">
            <text:p text:style-name="Table_20_Contents">Protocole JSON</text:p>
          </table:table-cell>
          <table:table-cell table:style-name="Table1.A1" office:value-type="string">
            <text:p text:style-name="Table_20_Contents">Sérialisation HELLO/HEARTBEAT/METRICS/CMD_RESULT</text:p>
          </table:table-cell>
        </table:table-row>
        <table:table-row>
          <table:table-cell table:style-name="Table1.A1" office:value-type="string">
            <text:p text:style-name="Table_20_Contents">src/metrics.h</text:p>
          </table:table-cell>
          <table:table-cell table:style-name="Table1.A1" office:value-type="string">
            <text:p text:style-name="Table_20_Contents">Interface métriques</text:p>
          </table:table-cell>
          <table:table-cell table:style-name="Table1.A1" office:value-type="string">
            <text:p text:style-name="Table_20_Contents">API plateforme-agnostique (implémentée par platform/)</text:p>
          </table:table-cell>
        </table:table-row>
        <table:table-row>
          <table:table-cell table:style-name="Table1.A1" office:value-type="string">
            <text:p text:style-name="Table_20_Contents">platform/linux/metrics_linux.c</text:p>
          </table:table-cell>
          <table:table-cell table:style-name="Table1.A1" office:value-type="string">
            <text:p text:style-name="Table_20_Contents">Métriques Linux</text:p>
          </table:table-cell>
          <table:table-cell table:style-name="Table1.A1" office:value-type="string">
            <text:p text:style-name="Table_20_Contents">/proc/stat (CPU diff), /proc/meminfo, /proc/net/dev</text:p>
          </table:table-cell>
        </table:table-row>
        <table:table-row>
          <table:table-cell table:style-name="Table1.A1" office:value-type="string">
            <text:p text:style-name="Table_20_Contents">src/connection.c/h</text:p>
          </table:table-cell>
          <table:table-cell table:style-name="Table1.A1" office:value-type="string">
            <text:p text:style-name="Table_20_Contents">Connexion WSS</text:p>
          </table:table-cell>
          <table:table-cell table:style-name="Table1.A1" office:value-type="string">
            <text:p text:style-name="Table_20_Contents">libwebsockets, file thread-safe, backoff exponentiel</text:p>
          </table:table-cell>
        </table:table-row>
        <table:table-row>
          <table:table-cell table:style-name="Table1.A1" office:value-type="string">
            <text:p text:style-name="Table_20_Contents">src/agent.c/h</text:p>
          </table:table-cell>
          <table:table-cell table:style-name="Table1.A1" office:value-type="string">
            <text:p text:style-name="Table_20_Contents">Orchestrateur</text:p>
          </table:table-cell>
          <table:table-cell table:style-name="Table1.A1" office:value-type="string">
            <text:p text:style-name="Table_20_Contents">Threads heartbeat + métriques, dispatch commandes</text:p>
          </table:table-cell>
        </table:table-row>
        <table:table-row>
          <table:table-cell table:style-name="Table1.A1" office:value-type="string">
            <text:p text:style-name="Table_20_Contents">src/main.c</text:p>
          </table:table-cell>
          <table:table-cell table:style-name="Table1.A1" office:value-type="string">
            <text:p text:style-name="Table_20_Contents">Point d'entrée</text:p>
          </table:table-cell>
          <table:table-cell table:style-name="Table1.A1" office:value-type="string">
            <text:p text:style-name="Table_20_Contents">Signal SIGTERM/SIGINT, boucle d'attente</text:p>
          </table:table-cell>
        </table:table-row>
        <table:table-row>
          <table:table-cell table:style-name="Table1.A1" office:value-type="string">
            <text:p text:style-name="Table_20_Contents">CMakeLists.txt</text:p>
          </table:table-cell>
          <table:table-cell table:style-name="Table1.A1" office:value-type="string">
            <text:p text:style-name="Table_20_Contents">Build system</text:p>
          </table:table-cell>
          <table:table-cell table:style-name="Table1.A1" office:value-type="string">
            <text:p text:style-name="Table_20_Contents">Cross-compilation Linux/Windows/macOS, flags sécurité</text:p>
          </table:table-cell>
        </table:table-row>
      </table:table>
      <text:h text:style-name="Heading_20_2" text:outline-level="2">2. Fichiers créés — Backend Go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Fichier</text:p>
          </table:table-cell>
          <table:table-cell table:style-name="Table2.A1" office:value-type="string">
            <text:p text:style-name="Table_20_Heading">Rôle</text:p>
          </table:table-cell>
          <table:table-cell table:style-name="Table2.A1" office:value-type="string">
            <text:p text:style-name="Table_20_Heading">Points clés</text:p>
          </table:table-cell>
        </table:table-row>
        <table:table-row>
          <table:table-cell table:style-name="Table2.A1" office:value-type="string">
            <text:p text:style-name="Table_20_Contents">go.mod</text:p>
          </table:table-cell>
          <table:table-cell table:style-name="Table2.A1" office:value-type="string">
            <text:p text:style-name="Table_20_Contents">Module Go</text:p>
          </table:table-cell>
          <table:table-cell table:style-name="Table2.A1" office:value-type="string">
            <text:p text:style-name="Table_20_Contents">chi, gorilla/websocket, pgx/v5, golang-jwt</text:p>
          </table:table-cell>
        </table:table-row>
        <table:table-row>
          <table:table-cell table:style-name="Table2.A1" office:value-type="string">
            <text:p text:style-name="Table_20_Contents">pkg/config/config.go</text:p>
          </table:table-cell>
          <table:table-cell table:style-name="Table2.A1" office:value-type="string">
            <text:p text:style-name="Table_20_Contents">Configuration</text:p>
          </table:table-cell>
          <table:table-cell table:style-name="Table2.A1" office:value-type="string">
            <text:p text:style-name="Table_20_Contents">12-factor app : 100% env vars, valeurs par défaut</text:p>
          </table:table-cell>
        </table:table-row>
        <table:table-row>
          <table:table-cell table:style-name="Table2.A1" office:value-type="string">
            <text:p text:style-name="Table_20_Contents">pkg/logger/logger.go</text:p>
          </table:table-cell>
          <table:table-cell table:style-name="Table2.A1" office:value-type="string">
            <text:p text:style-name="Table_20_Contents">Logger structuré</text:p>
          </table:table-cell>
          <table:table-cell table:style-name="Table2.A1" office:value-type="string">
            <text:p text:style-name="Table_20_Contents">slog, JSON en prod / Text en dev, enrichissement contexte</text:p>
          </table:table-cell>
        </table:table-row>
        <table:table-row>
          <table:table-cell table:style-name="Table2.A1" office:value-type="string">
            <text:p text:style-name="Table_20_Contents">internal/domain/agent/agent.go</text:p>
          </table:table-cell>
          <table:table-cell table:style-name="Table2.A1" office:value-type="string">
            <text:p text:style-name="Table_20_Contents">Entité Agent</text:p>
          </table:table-cell>
          <table:table-cell table:style-name="Table2.A1" office:value-type="string">
            <text:p text:style-name="Table_20_Contents">Types, statuts, interface Repository</text:p>
          </table:table-cell>
        </table:table-row>
        <table:table-row>
          <table:table-cell table:style-name="Table2.A1" office:value-type="string">
            <text:p text:style-name="Table_20_Contents">internal/domain/metric/metric.go</text:p>
          </table:table-cell>
          <table:table-cell table:style-name="Table2.A1" office:value-type="string">
            <text:p text:style-name="Table_20_Contents">Entité Metric</text:p>
          </table:table-cell>
          <table:table-cell table:style-name="Table2.A1" office:value-type="string">
            <text:p text:style-name="Table_20_Contents">Types, Snapshot.ToPoints(), ChooseResolution()</text:p>
          </table:table-cell>
        </table:table-row>
        <table:table-row>
          <table:table-cell table:style-name="Table2.A1" office:value-type="string">
            <text:p text:style-name="Table_20_Contents">internal/infrastructure/websocket/client.go</text:p>
          </table:table-cell>
          <table:table-cell table:style-name="Table2.A1" office:value-type="string">
            <text:p text:style-name="Table_20_Contents">Client WSS</text:p>
          </table:table-cell>
          <table:table-cell table:style-name="Table2.A1" office:value-type="string">
            <text:p text:style-name="Table_20_Contents">ReadPump + WritePump, ping/pong, batch write</text:p>
          </table:table-cell>
        </table:table-row>
        <table:table-row>
          <table:table-cell table:style-name="Table2.A1" office:value-type="string">
            <text:p text:style-name="Table_20_Contents">internal/infrastructure/websocket/hub.go</text:p>
          </table:table-cell>
          <table:table-cell table:style-name="Table2.A1" office:value-type="string">
            <text:p text:style-name="Table_20_Contents">Hub WSS</text:p>
          </table:table-cell>
          <table:table-cell table:style-name="Table2.A1" office:value-type="string">
            <text:p text:style-name="Table_20_Contents">Registre thread-safe, reconnexion propre, SendToAgent</text:p>
          </table:table-cell>
        </table:table-row>
        <table:table-row>
          <table:table-cell table:style-name="Table2.A1" office:value-type="string">
            <text:p text:style-name="Table_20_Contents">internal/infrastructure/websocket/dispatcher.go</text:p>
          </table:table-cell>
          <table:table-cell table:style-name="Table2.A1" office:value-type="string">
            <text:p text:style-name="Table_20_Contents">Dispatcher</text:p>
          </table:table-cell>
          <table:table-cell table:style-name="Table2.A1" office:value-type="string">
            <text:p text:style-name="Table_20_Contents">Routing HELLO/HEARTBEAT/METRICS/CMD_RESULT</text:p>
          </table:table-cell>
        </table:table-row>
        <table:table-row>
          <table:table-cell table:style-name="Table2.A1" office:value-type="string">
            <text:p text:style-name="Table_20_Contents">internal/interfaces/ws/agent_ws_handler.go</text:p>
          </table:table-cell>
          <table:table-cell table:style-name="Table2.A1" office:value-type="string">
            <text:p text:style-name="Table_20_Contents">Handler WS</text:p>
          </table:table-cell>
          <table:table-cell table:style-name="Table2.A1" office:value-type="string">
            <text:p text:style-name="Table_20_Contents">Upgrade HTTP, extraction identité mTLS, mode dev</text:p>
          </table:table-cell>
        </table:table-row>
        <table:table-row>
          <table:table-cell table:style-name="Table2.A1" office:value-type="string">
            <text:p text:style-name="Table_20_Contents">cmd/server/main.go</text:p>
          </table:table-cell>
          <table:table-cell table:style-name="Table2.A1" office:value-type="string">
            <text:p text:style-name="Table_20_Contents">Bootstrap</text:p>
          </table:table-cell>
          <table:table-cell table:style-name="Table2.A1" office:value-type="string">
            <text:p text:style-name="Table_20_Contents">DI manuelle, 2 serveurs (REST:8080 + WS:8081), graceful shutdown</text:p>
          </table:table-cell>
        </table:table-row>
      </table:table>
      <text:h text:style-name="Heading_20_2" text:outline-level="2">3. Architecture de Communication Agent ↔ Serveur</text:h>
      <text:p text:style-name="Preformatted_20_Text">Agent C (daemon) <text:s text:c="29"/>Backend Go</text:p>
      <text:p text:style-name="Preformatted_20_Text">─────────────────────────────────────────────────────────────────────</text:p>
      <text:p text:style-name="Preformatted_20_Text">main.c</text:p>
      <text:p text:style-name="Preformatted_20_Text"><text:s text:c="2"/>│</text:p>
      <text:p text:style-name="Preformatted_20_Text"><text:s text:c="2"/>├── leo_agent_start()</text:p>
      <text:p text:style-name="Preformatted_20_Text"><text:s text:c="2"/>│ <text:s text:c="4"/>├── leo_config_load() <text:s text:c="11"/>← agent.conf</text:p>
      <text:p text:style-name="Preformatted_20_Text"><text:s text:c="2"/>│ <text:s text:c="4"/>├── leo_metrics_init() <text:s text:c="10"/>← /proc/stat snapshot initial</text:p>
      <text:p text:style-name="Preformatted_20_Text"><text:s text:c="2"/>│ <text:s text:c="4"/>├── leo_conn_create() <text:s text:c="11"/>← lance _lws_thread</text:p>
      <text:p text:style-name="Preformatted_20_Text"><text:s text:c="2"/>│ <text:s text:c="4"/>│ <text:s text:c="4"/>└── _lws_thread <text:s text:c="11"/>← boucle événementielle LWS</text:p>
      <text:p text:style-name="Preformatted_20_Text"><text:s text:c="2"/>│ <text:s text:c="4"/>│ <text:s text:c="10"/>├── lws_service() <text:s text:c="3"/>← EVENT LOOP</text:p>
      <text:p text:style-name="Preformatted_20_Text"><text:s text:c="2"/>│ <text:s text:c="4"/>│ <text:s text:c="10"/>├── ESTABLISHED → enqueue HELLO</text:p>
      <text:p text:style-name="Preformatted_20_Text"><text:s text:c="2"/>│ <text:s text:c="4"/>│ <text:s text:c="10"/>├── RECEIVE → _on_message() (dispatch commandes)</text:p>
      <text:p text:style-name="Preformatted_20_Text"><text:s text:c="2"/>│ <text:s text:c="4"/>│ <text:s text:c="10"/>└── WRITEABLE → vide send_queue (mutex)</text:p>
      <text:p text:style-name="Preformatted_20_Text"><text:s text:c="2"/>│ <text:s text:c="4"/>├── _heartbeat_thread (30s) <text:s text:c="5"/>→ leo_conn_send(HEARTBEAT)</text:p>
      <text:p text:style-name="Preformatted_20_Text"><text:s text:c="2"/>│ <text:s text:c="4"/>└── _metrics_thread (60s) <text:s text:c="7"/>→ leo_conn_send(METRICS)</text:p>
      <text:p text:style-name="Preformatted_20_Text"><text:s text:c="2"/>│</text:p>
      <text:p text:style-name="Preformatted_20_Text"><text:s text:c="2"/>└── Boucle SIGTERM → leo_agent_stop()</text:p>
      <text:p text:style-name="Preformatted_20_Text"/>
      <text:p text:style-name="Preformatted_20_Text"><text:s text:c="25"/>│ <text:s/>WSS TLS 1.3 mTLS</text:p>
      <text:p text:style-name="Preformatted_20_Text"><text:s text:c="25"/>▼</text:p>
      <text:p text:style-name="Preformatted_20_Text">cmd/server/main.go</text:p>
      <text:p text:style-name="Preformatted_20_Text"><text:s text:c="2"/>├── wsServer :8081</text:p>
      <text:p text:style-name="Preformatted_20_Text"><text:s text:c="2"/>│ <text:s text:c="4"/>└── AgentWSHandler.ServeHTTP()</text:p>
      <text:p text:style-name="Preformatted_20_Text"><text:s text:c="2"/>│ <text:s text:c="10"/>├── extractIdentityFromCert() <text:s/>← CN=agent_id, OU=tenant_id</text:p>
      <text:p text:style-name="Preformatted_20_Text"><text:s text:c="2"/>│ <text:s text:c="10"/>├── upgrader.Upgrade()</text:p>
      <text:p text:style-name="Preformatted_20_Text"><text:s text:c="2"/>│ <text:s text:c="10"/>├── hub.Register(client)</text:p>
      <text:p text:style-name="Preformatted_20_Text"><text:s text:c="2"/>│ <text:s text:c="10"/>├── go client.WritePump()</text:p>
      <text:p text:style-name="Preformatted_20_Text"><text:s text:c="2"/>│ <text:s text:c="10"/>└── client.ReadPump() <text:s text:c="9"/>← BLOQUANT jusqu'à déco.</text:p>
      <text:p text:style-name="Preformatted_20_Text"><text:s text:c="2"/>│</text:p>
      <text:p text:style-name="Preformatted_20_Text"><text:s text:c="2"/>├── Hub (registre RWMutex)</text:p>
      <text:p text:style-name="Preformatted_20_Text"><text:s text:c="2"/>│ <text:s text:c="4"/>├── Register / Unregister</text:p>
      <text:p text:style-name="Preformatted_20_Text"><text:s text:c="2"/>│ <text:s text:c="4"/>├── SendToAgent(agentID, msg)</text:p>
      <text:p text:style-name="Preformatted_20_Text"><text:s text:c="2"/>│ <text:s text:c="4"/>└── HandleIncoming() → Dispatcher.Dispatch()</text:p>
      <text:p text:style-name="Preformatted_20_Text"><text:s text:c="2"/>│</text:p>
      <text:p text:style-name="Preformatted_20_Text"><text:s text:c="2"/>└── Dispatcher</text:p>
      <text:p text:style-name="Preformatted_20_Text"><text:s text:c="8"/>├── HELLO <text:s text:c="5"/>→ agentRepo.UpdateStatus(online) + HELLO_ACK</text:p>
      <text:p text:style-name="Preformatted_20_Text"><text:s text:c="8"/>├── HEARTBEAT <text:s/>→ agentRepo.UpdateStatus(online, lastSeen)</text:p>
      <text:p text:style-name="Preformatted_20_Text"><text:s text:c="8"/>├── METRICS <text:s text:c="3"/>→ Snapshot.ToPoints() → metricRepo.InsertBatch()</text:p>
      <text:p text:style-name="Preformatted_20_Text"><text:s text:c="8"/>└── CMD_RESULT → (commandes futures)</text:p>
      <text:h text:style-name="Heading_20_2" text:outline-level="2">4. Mesure CPU Linux — Méthode Différentielle</text:h>
      <text:p text:style-name="Text_20_body">La mesure CPU via <text:span text:style-name="Source_20_Text">/proc/stat</text:span> nécessite deux lectures séparées dans le temps. L'agent stocke le snapshot précédent dans un état statique et calcule la différence à chaque collecte :</text:p>
      <text:p text:style-name="Preformatted_20_Text">usage (%) = (total_delta - idle_delta) / total_delta × 100</text:p>
      <text:p text:style-name="Preformatted_20_Text"/>
      <text:p text:style-name="Preformatted_20_Text">où :</text:p>
      <text:p text:style-name="Preformatted_20_Text"><text:s text:c="2"/>total_delta = Σ(user+nice+system+idle+iowait+irq+softirq+steal) entre t-1 et t</text:p>
      <text:p text:style-name="Preformatted_20_Text"><text:s text:c="2"/>idle_delta <text:s/>= (idle + iowait) entre t-1 et t</text:p>
      <text:p text:style-name="P3"><text:span text:style-name="Strong_20_Emphasis"><text:span text:style-name="T1">Premier appel :</text:span></text:span><text:span text:style-name="T1"> comme il n'y a pas de snapshot précédent au démarrage, </text:span><text:span text:style-name="Source_20_Text"><text:span text:style-name="T1">leo_metrics_init()</text:span></text:span><text:span text:style-name="T1"> effectue une première lecture de </text:span><text:span text:style-name="Source_20_Text"><text:span text:style-name="T1">/proc/stat</text:span></text:span><text:span text:style-name="T1"> pour initialiser l'état. La première collecte retournera des valeurs valides dès le premier appel à </text:span><text:span text:style-name="Source_20_Text"><text:span text:style-name="T1">leo_metrics_collect()</text:span></text:span><text:span text:style-name="T1">. </text:span></text:p>
      <text:h text:style-name="Heading_20_2" text:outline-level="2">5. Thread-Safety de la File d'Envoi WSS</text:h>
      <text:p text:style-name="Preformatted_20_Text">Thread heartbeat / Thread métriques</text:p>
      <text:p text:style-name="Preformatted_20_Text"><text:s text:c="8"/>│</text:p>
      <text:p text:style-name="Preformatted_20_Text"><text:s text:c="8"/>▼ <text:s/>leo_conn_send(data, len)</text:p>
      <text:p text:style-name="Preformatted_20_Text">┌───────────────────────────────────────────┐</text:p>
      <text:p text:style-name="Preformatted_20_Text">│ <text:s/>pthread_mutex_lock(&amp;queue_mutex) <text:s text:c="8"/>│</text:p>
      <text:p text:style-name="Preformatted_20_Text">│ <text:s/>send_queue[queue_tail] = {data, len} <text:s text:c="4"/>│</text:p>
      <text:p text:style-name="Preformatted_20_Text">│ <text:s/>queue_tail = (queue_tail+1) % DEPTH <text:s text:c="5"/>│</text:p>
      <text:p text:style-name="Preformatted_20_Text">│ <text:s/>queue_count++ <text:s text:c="27"/>│</text:p>
      <text:p text:style-name="Preformatted_20_Text">│ <text:s/>pthread_mutex_unlock(&amp;queue_mutex) <text:s text:c="6"/>│</text:p>
      <text:p text:style-name="Preformatted_20_Text">│ <text:s/>lws_cancel_service(lws_ctx) <text:s/>← réveille │</text:p>
      <text:p text:style-name="Preformatted_20_Text">└───────────────────────────────────────────┘</text:p>
      <text:p text:style-name="Preformatted_20_Text"><text:s text:c="8"/>│</text:p>
      <text:p text:style-name="Preformatted_20_Text"><text:s text:c="8"/>▼ <text:s/>Thread LWS (event loop)</text:p>
      <text:p text:style-name="Preformatted_20_Text">┌───────────────────────────────────────────────────┐</text:p>
      <text:p text:style-name="Preformatted_20_Text">│ <text:s/>LWS_CALLBACK_CLIENT_WRITEABLE <text:s text:c="19"/>│</text:p>
      <text:p text:style-name="Preformatted_20_Text">│ <text:s text:c="3"/>pthread_mutex_lock(&amp;queue_mutex) <text:s text:c="14"/>│</text:p>
      <text:p text:style-name="Preformatted_20_Text">│ <text:s text:c="3"/>frame[LWS_PRE..] = send_queue[queue_head].data │</text:p>
      <text:p text:style-name="Preformatted_20_Text">│ <text:s text:c="3"/>lws_write(wsi, frame+LWS_PRE, len, TEXT) <text:s text:c="6"/>│</text:p>
      <text:p text:style-name="Preformatted_20_Text">│ <text:s text:c="3"/>queue_head++; queue_count-- <text:s text:c="19"/>│</text:p>
      <text:p text:style-name="Preformatted_20_Text">│ <text:s text:c="3"/>if queue_count &gt; 0: lws_callback_on_writable() │</text:p>
      <text:p text:style-name="Preformatted_20_Text">│ <text:s text:c="3"/>pthread_mutex_unlock(&amp;queue_mutex) <text:s text:c="12"/>│</text:p>
      <text:p text:style-name="Preformatted_20_Text">└───────────────────────────────────────────────────┘</text:p>
      <text:p text:style-name="P7"/>
      <text:p text:style-name="Horizontal_20_Line"/>
      <text:p text:style-name="P8">Leo-One RMM — Document Phase 4 — Confidenti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2.499cm" fo:margin-top="2.499cm" fo:margin-bottom="2.499cm" style:contextual-spacing="false"/>
      <style:text-properties fo:color="#1a1a1a" loext:opacity="100%" style:font-name="Arial" fo:font-family="Arial, sans-serif" fo:font-size="11pt" style:font-name-asian="Arial" style:font-family-asian="Arial, sans-serif" style:font-size-asian="11pt" style:font-name-complex="Arial" style:font-family-complex="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212cm" fo:border-left="none" fo:border-right="none" fo:border-top="none" fo:border-bottom="2.24pt solid #1e3a5f"/>
      <style:text-properties fo:color="#1e3a5f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6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847cm" fo:margin-bottom="0.212cm" style:contextual-spacing="false" fo:padding-left="0cm" fo:padding-right="0cm" fo:padding-top="0cm" fo:padding-bottom="0.106cm" fo:border-left="none" fo:border-right="none" fo:border-top="none" fo:border-bottom="0.06pt solid #aac4e0"/>
      <style:text-properties fo:color="#1e3a5f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Noto Sans Devanagari1" style:font-family-complex="'Noto Sans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29cm" fo:margin-bottom="0.212cm" style:contextual-spacing="false"/>
      <style:text-properties fo:color="#2c5f8a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65cm" fo:margin-right="0.265cm" fo:margin-top="0.265cm" fo:margin-bottom="0.265cm" style:contextual-spacing="false" fo:line-height="140%" fo:padding="0.265cm" fo:border="0.06pt solid #d0d7e2"/>
      <style:text-properties style:font-name="Courier New" fo:font-family="'Courier New', monospace" fo:font-size="8pt" style:font-name-asian="Courier New" style:font-family-asian="'Courier New', monospace" style:font-size-asian="8pt" style:font-name-complex="Courier New" style:font-family-complex="'Courier New', monospace" style:font-size-complex="8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o-One RMM — Phase 4 : Boilerplate Agent C &amp; Serveur Go</dc:title>
    <meta:document-statistic meta:table-count="2" meta:image-count="0" meta:object-count="0" meta:page-count="1" meta:paragraph-count="142" meta:word-count="572" meta:character-count="5360" meta:non-whitespace-character-count="4343"/>
    <meta:generator>LibreOffice/24.2.7.2$Linux_X86_64 LibreOffice_project/420$Build-2</meta:generator>
    <meta:user-defined meta:name=""/>
  </office:meta>
</office:document-meta>
</file>