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8cm" table:align="left"/>
    </style:style>
    <style:style style:name="Table1.A" style:family="table-column">
      <style:table-column-properties style:column-width="5.205cm"/>
    </style:style>
    <style:style style:name="Table1.B" style:family="table-column">
      <style:table-column-properties style:column-width="7.509cm"/>
    </style:style>
    <style:style style:name="Table1.C" style:family="table-column">
      <style:table-column-properties style:column-width="5.286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orizontal_20_Line">
      <style:paragraph-properties fo:text-align="center" style:justify-single-word="false"/>
    </style:style>
    <style:style style:name="P2" style:family="paragraph" style:parent-style-name="Heading_20_1" style:master-page-name="HTML">
      <style:paragraph-properties fo:margin-left="0cm" fo:margin-right="0cm" fo:text-align="center" style:justify-single-word="false" fo:text-indent="0cm" style:auto-text-indent="false" style:page-number="auto"/>
      <style:text-properties loext:padding="0cm" loext:border="none"/>
    </style:style>
    <style:style style:name="P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2c5f8a" loext:opacity="100%" fo:font-size="15pt" fo:font-weight="bold" loext:padding="0cm" loext:border="none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444444" loext:opacity="100%" fo:font-size="14pt" loext:padding="0cm" loext:border="none"/>
    </style:style>
    <style:style style:name="P5" style:family="paragraph" style:parent-style-name="Text_20_body">
      <style:paragraph-properties fo:text-align="center" style:justify-single-word="false"/>
      <style:text-properties loext:padding="0cm" loext:border="none"/>
    </style:style>
    <style:style style:name="P6" style:family="paragraph" style:parent-style-name="Text_20_body">
      <style:paragraph-properties fo:margin-top="0cm" fo:margin-bottom="0cm" style:contextual-spacing="false"/>
    </style:style>
    <style:style style:name="P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888888" loext:opacity="100%" fo:font-size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o-One RMM</text:p>
      <text:p text:style-name="P3">Alternative moderne à Action1, NinjaOne, ConnectWise Automate</text:p>
      <text:p text:style-name="P1"/>
      <text:p text:style-name="P4">PHASE 2 — Arborescence Complète du Projet &amp; Configuration Docker/Kubernetes</text:p>
      <text:p text:style-name="P5">Stack : Agent C | Backend Go (Chi) | Frontend React/TS (Zustand + React Query) | PostgreSQL + TimescaleDB</text:p>
      <text:p text:style-name="P5">Document généré le 24 juin 2026</text:p>
      <text:p text:style-name="Horizontal_20_Line"/>
      <text:h text:style-name="Heading_20_2" text:outline-level="2">1. Arborescence Globale du Monorepo</text:h>
      <text:p text:style-name="Preformatted_20_Text">leo-one/</text:p>
      <text:p text:style-name="Preformatted_20_Text">├── agent/ <text:s text:c="23"/># Agent C (daemon machine cible)</text:p>
      <text:p text:style-name="Preformatted_20_Text">├── backend/ <text:s text:c="21"/># Serveur Go (Clean Architecture)</text:p>
      <text:p text:style-name="Preformatted_20_Text">├── frontend/ <text:s text:c="20"/># React + TypeScript + Tailwind</text:p>
      <text:p text:style-name="Preformatted_20_Text">├── infra/ <text:s text:c="23"/># Docker, Kubernetes, scripts CI</text:p>
      <text:p text:style-name="Preformatted_20_Text">├── docs/ <text:s text:c="24"/># Documentation technique</text:p>
      <text:p text:style-name="Preformatted_20_Text">└── scripts/ <text:s text:c="21"/># Build, packaging, release</text:p>
      <text:h text:style-name="Heading_20_2" text:outline-level="2">2. Agent C — Arborescence Détaillée</text:h>
      <text:p text:style-name="Preformatted_20_Text">agent/</text:p>
      <text:p text:style-name="Preformatted_20_Text">├── CMakeLists.txt <text:s text:c="19"/># Build system principal</text:p>
      <text:p text:style-name="Preformatted_20_Text">├── Dockerfile.builder <text:s text:c="15"/># Image de cross-compilation</text:p>
      <text:p text:style-name="Preformatted_20_Text">│</text:p>
      <text:p text:style-name="Preformatted_20_Text">├── include/</text:p>
      <text:p text:style-name="Preformatted_20_Text">│ <text:s text:c="2"/>└── leo_agent.h <text:s text:c="18"/># Header public (types, constantes globales)</text:p>
      <text:p text:style-name="Preformatted_20_Text">│</text:p>
      <text:p text:style-name="Preformatted_20_Text">├── src/</text:p>
      <text:p text:style-name="Preformatted_20_Text">│ <text:s text:c="2"/>├── main.c <text:s text:c="23"/># Point d'entrée, init service OS</text:p>
      <text:p text:style-name="Preformatted_20_Text">│ <text:s text:c="2"/>├── agent.c / agent.h <text:s text:c="12"/># Orchestrateur principal, boucle de vie</text:p>
      <text:p text:style-name="Preformatted_20_Text">│ <text:s text:c="2"/>├── config.c / config.h <text:s text:c="10"/># Lecture/écriture agent.conf (INI)</text:p>
      <text:p text:style-name="Preformatted_20_Text">│ <text:s text:c="2"/>├── connection.c / connection.h <text:s text:c="2"/># WSS : connect, send, recv, reconnect</text:p>
      <text:p text:style-name="Preformatted_20_Text">│ <text:s text:c="2"/>├── enrollment.c / enrollment.h <text:s text:c="2"/># Processus d'enrollment (1 seule fois)</text:p>
      <text:p text:style-name="Preformatted_20_Text">│ <text:s text:c="2"/>├── heartbeat.c / heartbeat.h <text:s text:c="4"/># Thread heartbeat (30s)</text:p>
      <text:p text:style-name="Preformatted_20_Text">│ <text:s text:c="2"/>├── metrics.c / metrics.h <text:s text:c="8"/># Interface générique collecte métriques</text:p>
      <text:p text:style-name="Preformatted_20_Text">│ <text:s text:c="2"/>├── inventory.c / inventory.h <text:s text:c="4"/># Interface générique inventaire HW/SW</text:p>
      <text:p text:style-name="Preformatted_20_Text">│ <text:s text:c="2"/>├── executor.c / executor.h <text:s text:c="6"/># Exécution scripts (PS1/Bash/CMD)</text:p>
      <text:p text:style-name="Preformatted_20_Text">│ <text:s text:c="2"/>├── protocol.c / protocol.h <text:s text:c="6"/># Sérialisation/désérialisation JSON</text:p>
      <text:p text:style-name="Preformatted_20_Text">│ <text:s text:c="2"/>└── logger.c / logger.h <text:s text:c="10"/># Logger (niveaux, rotation fichier)</text:p>
      <text:p text:style-name="Preformatted_20_Text">│</text:p>
      <text:p text:style-name="Preformatted_20_Text">├── platform/</text:p>
      <text:p text:style-name="Preformatted_20_Text">│ <text:s text:c="2"/>├── windows/</text:p>
      <text:p text:style-name="Preformatted_20_Text">│ <text:s text:c="2"/>│ <text:s text:c="2"/>├── metrics_win.c <text:s text:c="12"/># CPU/RAM/Disk via PDH + WMI</text:p>
      <text:p text:style-name="Preformatted_20_Text">│ <text:s text:c="2"/>│ <text:s text:c="2"/>├── inventory_win.c <text:s text:c="10"/># Inventaire via WMI (COM)</text:p>
      <text:p text:style-name="Preformatted_20_Text">│ <text:s text:c="2"/>│ <text:s text:c="2"/>├── service_win.c <text:s text:c="12"/># Windows Service (SCM)</text:p>
      <text:p text:style-name="Preformatted_20_Text">│ <text:s text:c="2"/>│ <text:s text:c="2"/>├── executor_win.c <text:s text:c="11"/># CreateProcess, ShellExecuteEx</text:p>
      <text:p text:style-name="Preformatted_20_Text">│ <text:s text:c="2"/>│ <text:s text:c="2"/>└── crypto_win.c <text:s text:c="13"/># BCrypt API (génération clé RSA)</text:p>
      <text:p text:style-name="Preformatted_20_Text">│ <text:s text:c="2"/>├── linux/</text:p>
      <text:p text:style-name="Preformatted_20_Text">│ <text:s text:c="2"/>│ <text:s text:c="2"/>├── metrics_linux.c <text:s text:c="10"/># /proc/stat, /proc/meminfo, /sys/</text:p>
      <text:p text:style-name="Preformatted_20_Text">│ <text:s text:c="2"/>│ <text:s text:c="2"/>├── inventory_linux.c <text:s text:c="8"/># /sys/class, lspci, dpkg/rpm</text:p>
      <text:p text:style-name="Preformatted_20_Text">│ <text:s text:c="2"/>│ <text:s text:c="2"/>├── service_linux.c <text:s text:c="10"/># systemd sd_notify</text:p>
      <text:p text:style-name="Preformatted_20_Text">│ <text:s text:c="2"/>│ <text:s text:c="2"/>├── executor_linux.c <text:s text:c="9"/># fork/execve</text:p>
      <text:p text:style-name="Preformatted_20_Text">│ <text:s text:c="2"/>│ <text:s text:c="2"/>└── crypto_linux.c <text:s text:c="11"/># OpenSSL (libssl statique)</text:p>
      <text:p text:style-name="Preformatted_20_Text">│ <text:s text:c="2"/>└── macos/</text:p>
      <text:p text:style-name="Preformatted_20_Text">│ <text:s text:c="6"/>├── metrics_macos.c <text:s text:c="10"/># sysctl, IOKit, mach_host_info</text:p>
      <text:p text:style-name="Preformatted_20_Text">│ <text:s text:c="6"/>├── inventory_macos.c <text:s text:c="8"/># system_profiler, IOKit</text:p>
      <text:p text:style-name="Preformatted_20_Text">│ <text:s text:c="6"/>├── service_macos.c <text:s text:c="10"/># launchd (plist)</text:p>
      <text:p text:style-name="Preformatted_20_Text">│ <text:s text:c="6"/>├── executor_macos.c <text:s text:c="9"/># posix_spawn</text:p>
      <text:p text:style-name="Preformatted_20_Text">│ <text:s text:c="6"/>└── crypto_macos.c <text:s text:c="11"/># SecKey API (Security.framework)</text:p>
      <text:p text:style-name="Preformatted_20_Text">│</text:p>
      <text:p text:style-name="Preformatted_20_Text">└── third_party/</text:p>
      <text:p text:style-name="Preformatted_20_Text"><text:s text:c="4"/>├── libwebsockets/ <text:s text:c="15"/># vendored (v4.x, build statique)</text:p>
      <text:p text:style-name="Preformatted_20_Text"><text:s text:c="4"/>├── cjson/ <text:s text:c="23"/># cJSON (parsing JSON léger)</text:p>
      <text:p text:style-name="Preformatted_20_Text"><text:s text:c="4"/>└── mbedtls/ <text:s text:c="21"/># mbedTLS (fallback TLS si OpenSSL absent)</text:p>
      <text:h text:style-name="Heading_20_2" text:outline-level="2">3. Backend Go — Arborescence Détaillée (Clean Architecture)</text:h>
      <text:p text:style-name="Text_20_body">L'architecture suit le principe de dépendance inversée : les couches internes (domain, application) ne connaissent pas les couches externes (infrastructure, interfaces). Seules les interfaces sont partagées.</text:p>
      <text:p text:style-name="Preformatted_20_Text">backend/</text:p>
      <text:p text:style-name="Preformatted_20_Text">├── go.mod</text:p>
      <text:p text:style-name="Preformatted_20_Text">├── go.sum</text:p>
      <text:p text:style-name="Preformatted_20_Text">├── Dockerfile</text:p>
      <text:p text:style-name="Preformatted_20_Text">│</text:p>
      <text:p text:style-name="Preformatted_20_Text">├── cmd/</text:p>
      <text:p text:style-name="Preformatted_20_Text">│ <text:s text:c="2"/>└── server/</text:p>
      <text:p text:style-name="Preformatted_20_Text">│ <text:s text:c="6"/>└── main.go <text:s text:c="18"/># Bootstrap : config, DI, démarrage</text:p>
      <text:p text:style-name="Preformatted_20_Text">│</text:p>
      <text:p text:style-name="Preformatted_20_Text">├── internal/</text:p>
      <text:p text:style-name="Preformatted_20_Text">│ <text:s text:c="2"/>│</text:p>
      <text:p text:style-name="Preformatted_20_Text">│ <text:s text:c="2"/>├── domain/ <text:s text:c="22"/># Couche 1 : Entités pures (0 dépendance externe)</text:p>
      <text:p text:style-name="Preformatted_20_Text">│ <text:s text:c="2"/>│ <text:s text:c="2"/>├── agent/</text:p>
      <text:p text:style-name="Preformatted_20_Text">│ <text:s text:c="2"/>│ <text:s text:c="2"/>│ <text:s text:c="2"/>├── agent.go <text:s text:c="13"/># struct Agent, AgentStatus, AgentOS</text:p>
      <text:p text:style-name="Preformatted_20_Text">│ <text:s text:c="2"/>│ <text:s text:c="2"/>│ <text:s text:c="2"/>├── repository.go <text:s text:c="8"/># interface AgentRepository</text:p>
      <text:p text:style-name="Preformatted_20_Text">│ <text:s text:c="2"/>│ <text:s text:c="2"/>│ <text:s text:c="2"/>└── service.go <text:s text:c="11"/># interface AgentDomainService</text:p>
      <text:p text:style-name="Preformatted_20_Text">│ <text:s text:c="2"/>│ <text:s text:c="2"/>├── tenant/</text:p>
      <text:p text:style-name="Preformatted_20_Text">│ <text:s text:c="2"/>│ <text:s text:c="2"/>│ <text:s text:c="2"/>├── tenant.go <text:s text:c="12"/># struct Tenant, Plan, Limits</text:p>
      <text:p text:style-name="Preformatted_20_Text">│ <text:s text:c="2"/>│ <text:s text:c="2"/>│ <text:s text:c="2"/>└── repository.go <text:s text:c="8"/># interface TenantRepository</text:p>
      <text:p text:style-name="Preformatted_20_Text">│ <text:s text:c="2"/>│ <text:s text:c="2"/>├── metric/</text:p>
      <text:p text:style-name="Preformatted_20_Text">│ <text:s text:c="2"/>│ <text:s text:c="2"/>│ <text:s text:c="2"/>├── metric.go <text:s text:c="12"/># struct MetricPoint, MetricType</text:p>
      <text:p text:style-name="Preformatted_20_Text">│ <text:s text:c="2"/>│ <text:s text:c="2"/>│ <text:s text:c="2"/>└── repository.go <text:s text:c="8"/># interface MetricRepository</text:p>
      <text:p text:style-name="Preformatted_20_Text">│ <text:s text:c="2"/>│ <text:s text:c="2"/>├── alert/</text:p>
      <text:p text:style-name="Preformatted_20_Text">│ <text:s text:c="2"/>│ <text:s text:c="2"/>│ <text:s text:c="2"/>├── alert.go <text:s text:c="13"/># struct Alert, AlertRule, Severity</text:p>
      <text:p text:style-name="Preformatted_20_Text">│ <text:s text:c="2"/>│ <text:s text:c="2"/>│ <text:s text:c="2"/>└── repository.go</text:p>
      <text:p text:style-name="Preformatted_20_Text">│ <text:s text:c="2"/>│ <text:s text:c="2"/>├── ticket/</text:p>
      <text:p text:style-name="Preformatted_20_Text">│ <text:s text:c="2"/>│ <text:s text:c="2"/>│ <text:s text:c="2"/>├── ticket.go <text:s text:c="12"/># struct Ticket, Comment, Priority</text:p>
      <text:p text:style-name="Preformatted_20_Text">│ <text:s text:c="2"/>│ <text:s text:c="2"/>│ <text:s text:c="2"/>└── repository.go</text:p>
      <text:p text:style-name="Preformatted_20_Text">│ <text:s text:c="2"/>│ <text:s text:c="2"/>└── user/</text:p>
      <text:p text:style-name="Preformatted_20_Text">│ <text:s text:c="2"/>│ <text:s text:c="6"/>├── user.go <text:s text:c="14"/># struct User, Role, Permission</text:p>
      <text:p text:style-name="Preformatted_20_Text">│ <text:s text:c="2"/>│ <text:s text:c="6"/>└── repository.go</text:p>
      <text:p text:style-name="Preformatted_20_Text">│ <text:s text:c="2"/>│</text:p>
      <text:p text:style-name="Preformatted_20_Text">│ <text:s text:c="2"/>├── application/ <text:s text:c="17"/># Couche 2 : Use Cases (orchestration)</text:p>
      <text:p text:style-name="Preformatted_20_Text">│ <text:s text:c="2"/>│ <text:s text:c="2"/>├── agent/</text:p>
      <text:p text:style-name="Preformatted_20_Text">│ <text:s text:c="2"/>│ <text:s text:c="2"/>│ <text:s text:c="2"/>├── enroll_agent.go <text:s text:c="6"/># UC : Enrollment d'un nouvel agent</text:p>
      <text:p text:style-name="Preformatted_20_Text">│ <text:s text:c="2"/>│ <text:s text:c="2"/>│ <text:s text:c="2"/>├── list_agents.go <text:s text:c="7"/># UC : Lister agents par tenant</text:p>
      <text:p text:style-name="Preformatted_20_Text">│ <text:s text:c="2"/>│ <text:s text:c="2"/>│ <text:s text:c="2"/>├── get_agent.go <text:s text:c="9"/># UC : Détail d'un agent</text:p>
      <text:p text:style-name="Preformatted_20_Text">│ <text:s text:c="2"/>│ <text:s text:c="2"/>│ <text:s text:c="2"/>└── execute_command.go <text:s text:c="3"/># UC : Envoyer commande à un agent</text:p>
      <text:p text:style-name="Preformatted_20_Text">│ <text:s text:c="2"/>│ <text:s text:c="2"/>├── metric/</text:p>
      <text:p text:style-name="Preformatted_20_Text">│ <text:s text:c="2"/>│ <text:s text:c="2"/>│ <text:s text:c="2"/>├── ingest_metrics.go <text:s text:c="4"/># UC : Ingestion batch métriques</text:p>
      <text:p text:style-name="Preformatted_20_Text">│ <text:s text:c="2"/>│ <text:s text:c="2"/>│ <text:s text:c="2"/>└── query_metrics.go <text:s text:c="5"/># UC : Requête métriques (range)</text:p>
      <text:p text:style-name="Preformatted_20_Text">│ <text:s text:c="2"/>│ <text:s text:c="2"/>├── alert/</text:p>
      <text:p text:style-name="Preformatted_20_Text">│ <text:s text:c="2"/>│ <text:s text:c="2"/>│ <text:s text:c="2"/>├── evaluate_rules.go <text:s text:c="4"/># UC : Évaluation règles d'alerte</text:p>
      <text:p text:style-name="Preformatted_20_Text">│ <text:s text:c="2"/>│ <text:s text:c="2"/>│ <text:s text:c="2"/>└── acknowledge_alert.go <text:s/># UC : Acquittement alerte</text:p>
      <text:p text:style-name="Preformatted_20_Text">│ <text:s text:c="2"/>│ <text:s text:c="2"/>├── ticket/</text:p>
      <text:p text:style-name="Preformatted_20_Text">│ <text:s text:c="2"/>│ <text:s text:c="2"/>│ <text:s text:c="2"/>├── create_ticket.go</text:p>
      <text:p text:style-name="Preformatted_20_Text">│ <text:s text:c="2"/>│ <text:s text:c="2"/>│ <text:s text:c="2"/>└── update_ticket.go</text:p>
      <text:p text:style-name="Preformatted_20_Text">│ <text:s text:c="2"/>│ <text:s text:c="2"/>└── auth/</text:p>
      <text:p text:style-name="Preformatted_20_Text">│ <text:s text:c="2"/>│ <text:s text:c="6"/>├── login.go <text:s text:c="13"/># UC : Login + MFA</text:p>
      <text:p text:style-name="Preformatted_20_Text">│ <text:s text:c="2"/>│ <text:s text:c="6"/>├── refresh_token.go <text:s text:c="5"/># UC : Refresh JWT</text:p>
      <text:p text:style-name="Preformatted_20_Text">│ <text:s text:c="2"/>│ <text:s text:c="6"/>└── manage_users.go <text:s text:c="6"/># UC : CRUD utilisateurs + rôles</text:p>
      <text:p text:style-name="Preformatted_20_Text">│ <text:s text:c="2"/>│</text:p>
      <text:p text:style-name="Preformatted_20_Text">│ <text:s text:c="2"/>├── infrastructure/ <text:s text:c="14"/># Couche 3 : Implémentations concrètes</text:p>
      <text:p text:style-name="Preformatted_20_Text">│ <text:s text:c="2"/>│ <text:s text:c="2"/>├── persistence/</text:p>
      <text:p text:style-name="Preformatted_20_Text">│ <text:s text:c="2"/>│ <text:s text:c="2"/>│ <text:s text:c="2"/>└── postgres/</text:p>
      <text:p text:style-name="Preformatted_20_Text">│ <text:s text:c="2"/>│ <text:s text:c="2"/>│ <text:s text:c="6"/>├── db.go <text:s text:c="12"/># Pool de connexions (pgx/v5)</text:p>
      <text:p text:style-name="Preformatted_20_Text">│ <text:s text:c="2"/>│ <text:s text:c="2"/>│ <text:s text:c="6"/>├── agent_repo.go</text:p>
      <text:p text:style-name="Preformatted_20_Text">│ <text:s text:c="2"/>│ <text:s text:c="2"/>│ <text:s text:c="6"/>├── tenant_repo.go</text:p>
      <text:p text:style-name="Preformatted_20_Text"><text:soft-page-break/>│ <text:s text:c="2"/>│ <text:s text:c="2"/>│ <text:s text:c="6"/>├── metric_repo.go <text:s text:c="3"/># Requêtes TimescaleDB (hypertables)</text:p>
      <text:p text:style-name="Preformatted_20_Text">│ <text:s text:c="2"/>│ <text:s text:c="2"/>│ <text:s text:c="6"/>├── alert_repo.go</text:p>
      <text:p text:style-name="Preformatted_20_Text">│ <text:s text:c="2"/>│ <text:s text:c="2"/>│ <text:s text:c="6"/>├── ticket_repo.go</text:p>
      <text:p text:style-name="Preformatted_20_Text">│ <text:s text:c="2"/>│ <text:s text:c="2"/>│ <text:s text:c="6"/>└── user_repo.go</text:p>
      <text:p text:style-name="Preformatted_20_Text">│ <text:s text:c="2"/>│ <text:s text:c="2"/>├── websocket/</text:p>
      <text:p text:style-name="Preformatted_20_Text">│ <text:s text:c="2"/>│ <text:s text:c="2"/>│ <text:s text:c="2"/>├── hub.go <text:s text:c="15"/># Hub WSS : registre des connexions actives</text:p>
      <text:p text:style-name="Preformatted_20_Text">│ <text:s text:c="2"/>│ <text:s text:c="2"/>│ <text:s text:c="2"/>├── client.go <text:s text:c="12"/># struct Client (une connexion agent)</text:p>
      <text:p text:style-name="Preformatted_20_Text">│ <text:s text:c="2"/>│ <text:s text:c="2"/>│ <text:s text:c="2"/>└── dispatcher.go <text:s text:c="8"/># Routing des messages entrants</text:p>
      <text:p text:style-name="Preformatted_20_Text">│ <text:s text:c="2"/>│ <text:s text:c="2"/>├── ca/</text:p>
      <text:p text:style-name="Preformatted_20_Text">│ <text:s text:c="2"/>│ <text:s text:c="2"/>│ <text:s text:c="2"/>├── ca.go <text:s text:c="16"/># CA interne : signe les certificats agents</text:p>
      <text:p text:style-name="Preformatted_20_Text">│ <text:s text:c="2"/>│ <text:s text:c="2"/>│ <text:s text:c="2"/>└── cert_store.go <text:s text:c="8"/># Stockage/révocation certificats</text:p>
      <text:p text:style-name="Preformatted_20_Text">│ <text:s text:c="2"/>│ <text:s text:c="2"/>└── cache/</text:p>
      <text:p text:style-name="Preformatted_20_Text">│ <text:s text:c="2"/>│ <text:s text:c="6"/>└── memory_cache.go <text:s text:c="6"/># Cache in-process (sessions WSS actives)</text:p>
      <text:p text:style-name="Preformatted_20_Text">│ <text:s text:c="2"/>│</text:p>
      <text:p text:style-name="Preformatted_20_Text">│ <text:s text:c="2"/>└── interfaces/ <text:s text:c="18"/># Couche 4 : Handlers (points d'entrée)</text:p>
      <text:p text:style-name="Preformatted_20_Text">│ <text:s text:c="6"/>├── http/</text:p>
      <text:p text:style-name="Preformatted_20_Text">│ <text:s text:c="6"/>│ <text:s text:c="2"/>├── router.go <text:s text:c="12"/># Montage Chi + middlewares globaux</text:p>
      <text:p text:style-name="Preformatted_20_Text">│ <text:s text:c="6"/>│ <text:s text:c="2"/>├── middleware/</text:p>
      <text:p text:style-name="Preformatted_20_Text">│ <text:s text:c="6"/>│ <text:s text:c="2"/>│ <text:s text:c="2"/>├── auth.go <text:s text:c="10"/># Validation JWT + extraction tenant_id</text:p>
      <text:p text:style-name="Preformatted_20_Text">│ <text:s text:c="6"/>│ <text:s text:c="2"/>│ <text:s text:c="2"/>├── rbac.go <text:s text:c="10"/># Vérification permissions par rôle</text:p>
      <text:p text:style-name="Preformatted_20_Text">│ <text:s text:c="6"/>│ <text:s text:c="2"/>│ <text:s text:c="2"/>├── tenant.go <text:s text:c="8"/># Injection tenant_id dans context</text:p>
      <text:p text:style-name="Preformatted_20_Text">│ <text:s text:c="6"/>│ <text:s text:c="2"/>│ <text:s text:c="2"/>├── logger.go <text:s text:c="8"/># Log structuré par requête</text:p>
      <text:p text:style-name="Preformatted_20_Text">│ <text:s text:c="6"/>│ <text:s text:c="2"/>│ <text:s text:c="2"/>└── rate_limit.go <text:s text:c="4"/># Rate limiting par tenant</text:p>
      <text:p text:style-name="Preformatted_20_Text">│ <text:s text:c="6"/>│ <text:s text:c="2"/>└── handler/</text:p>
      <text:p text:style-name="Preformatted_20_Text">│ <text:s text:c="6"/>│ <text:s text:c="6"/>├── agent_handler.go</text:p>
      <text:p text:style-name="Preformatted_20_Text">│ <text:s text:c="6"/>│ <text:s text:c="6"/>├── metric_handler.go</text:p>
      <text:p text:style-name="Preformatted_20_Text">│ <text:s text:c="6"/>│ <text:s text:c="6"/>├── alert_handler.go</text:p>
      <text:p text:style-name="Preformatted_20_Text">│ <text:s text:c="6"/>│ <text:s text:c="6"/>├── ticket_handler.go</text:p>
      <text:p text:style-name="Preformatted_20_Text">│ <text:s text:c="6"/>│ <text:s text:c="6"/>├── auth_handler.go</text:p>
      <text:p text:style-name="Preformatted_20_Text">│ <text:s text:c="6"/>│ <text:s text:c="6"/>└── tenant_handler.go</text:p>
      <text:p text:style-name="Preformatted_20_Text">│ <text:s text:c="6"/>└── ws/</text:p>
      <text:p text:style-name="Preformatted_20_Text">│ <text:s text:c="10"/>└── agent_ws_handler.go <text:s text:c="2"/># Upgrade HTTP → WSS agent</text:p>
      <text:p text:style-name="Preformatted_20_Text">│</text:p>
      <text:p text:style-name="Preformatted_20_Text">├── pkg/ <text:s text:c="29"/># Packages partagés, sans logique métier</text:p>
      <text:p text:style-name="Preformatted_20_Text">│ <text:s text:c="2"/>├── config/</text:p>
      <text:p text:style-name="Preformatted_20_Text">│ <text:s text:c="2"/>│ <text:s text:c="2"/>└── config.go <text:s text:c="16"/># Lecture env vars / fichier YAML</text:p>
      <text:p text:style-name="Preformatted_20_Text">│ <text:s text:c="2"/>├── logger/</text:p>
      <text:p text:style-name="Preformatted_20_Text">│ <text:s text:c="2"/>│ <text:s text:c="2"/>└── logger.go <text:s text:c="16"/># Logger structuré (slog)</text:p>
      <text:p text:style-name="Preformatted_20_Text">│ <text:s text:c="2"/>├── crypto/</text:p>
      <text:p text:style-name="Preformatted_20_Text">│ <text:s text:c="2"/>│ <text:s text:c="2"/>├── jwt.go <text:s text:c="19"/># Génération/validation JWT (RS256)</text:p>
      <text:p text:style-name="Preformatted_20_Text">│ <text:s text:c="2"/>│ <text:s text:c="2"/>└── password.go <text:s text:c="14"/># Hash argon2id</text:p>
      <text:p text:style-name="Preformatted_20_Text">│ <text:s text:c="2"/>├── errors/</text:p>
      <text:p text:style-name="Preformatted_20_Text">│ <text:s text:c="2"/>│ <text:s text:c="2"/>└── errors.go <text:s text:c="16"/># Types d'erreurs domaine + codes HTTP</text:p>
      <text:p text:style-name="Preformatted_20_Text">│ <text:s text:c="2"/>└── pagination/</text:p>
      <text:p text:style-name="Preformatted_20_Text">│ <text:s text:c="6"/>└── pagination.go <text:s text:c="12"/># Helpers cursor-based pagination</text:p>
      <text:p text:style-name="Preformatted_20_Text">│</text:p>
      <text:p text:style-name="Preformatted_20_Text">└── migrations/</text:p>
      <text:p text:style-name="Preformatted_20_Text"><text:s text:c="4"/>├── 001_init_schema.sql</text:p>
      <text:p text:style-name="Preformatted_20_Text"><text:s text:c="4"/>├── 002_timescaledb_hypertables.sql</text:p>
      <text:p text:style-name="Preformatted_20_Text"><text:s text:c="4"/>└── 003_rbac_seed.sql</text:p>
      <text:h text:style-name="Heading_20_2" text:outline-level="2">4. Frontend React/TypeScript — Arborescence Détaillée</text:h>
      <text:p text:style-name="Text_20_body">Framework de state : <text:span text:style-name="Strong_20_Emphasis">Zustand</text:span> (état UI global) + <text:span text:style-name="Strong_20_Emphasis">React Query</text:span> (cache serveur). Composants UI : <text:span text:style-name="Strong_20_Emphasis">Shadcn/ui</text:span> + <text:span text:style-name="Strong_20_Emphasis">Tailwind CSS</text:span>. Build tool : <text:span text:style-name="Strong_20_Emphasis">Vite</text:span>.</text:p>
      <text:p text:style-name="Preformatted_20_Text">frontend/</text:p>
      <text:p text:style-name="Preformatted_20_Text">├── package.json</text:p>
      <text:p text:style-name="Preformatted_20_Text">├── tsconfig.json</text:p>
      <text:p text:style-name="Preformatted_20_Text">├── vite.config.ts</text:p>
      <text:p text:style-name="Preformatted_20_Text">├── tailwind.config.ts</text:p>
      <text:p text:style-name="Preformatted_20_Text">├── components.json <text:s text:c="18"/># Config Shadcn/ui</text:p>
      <text:p text:style-name="Preformatted_20_Text">├── Dockerfile</text:p>
      <text:p text:style-name="Preformatted_20_Text">│</text:p>
      <text:p text:style-name="Preformatted_20_Text">├── public/</text:p>
      <text:p text:style-name="Preformatted_20_Text">│ <text:s text:c="2"/>└── favicon.svg</text:p>
      <text:p text:style-name="Preformatted_20_Text">│</text:p>
      <text:p text:style-name="Preformatted_20_Text">└── src/</text:p>
      <text:p text:style-name="Preformatted_20_Text"><text:s text:c="4"/>├── main.tsx <text:s text:c="21"/># Point d'entrée React</text:p>
      <text:p text:style-name="Preformatted_20_Text"><text:s text:c="4"/>├── App.tsx <text:s text:c="22"/># Router racine + providers</text:p>
      <text:p text:style-name="Preformatted_20_Text"><text:s text:c="4"/>│</text:p>
      <text:p text:style-name="Preformatted_20_Text"><text:s text:c="4"/>├── api/ <text:s text:c="25"/># Clients HTTP (fetch + React Query)</text:p>
      <text:p text:style-name="Preformatted_20_Text"><text:s text:c="4"/>│ <text:s text:c="2"/>├── client.ts <text:s text:c="16"/># Instance fetch configurée (base URL, interceptors JWT)</text:p>
      <text:p text:style-name="Preformatted_20_Text"><text:s text:c="4"/>│ <text:s text:c="2"/>├── agents.ts</text:p>
      <text:p text:style-name="Preformatted_20_Text"><text:s text:c="4"/>│ <text:s text:c="2"/>├── metrics.ts</text:p>
      <text:p text:style-name="Preformatted_20_Text"><text:s text:c="4"/>│ <text:s text:c="2"/>├── alerts.ts</text:p>
      <text:p text:style-name="Preformatted_20_Text"><text:s text:c="4"/>│ <text:s text:c="2"/>├── tickets.ts</text:p>
      <text:p text:style-name="Preformatted_20_Text"><text:s text:c="4"/>│ <text:s text:c="2"/>└── auth.ts</text:p>
      <text:p text:style-name="Preformatted_20_Text"><text:s text:c="4"/>│</text:p>
      <text:p text:style-name="Preformatted_20_Text"><text:s text:c="4"/>├── store/ <text:s text:c="23"/># État global Zustand</text:p>
      <text:p text:style-name="Preformatted_20_Text"><text:s text:c="4"/>│ <text:s text:c="2"/>├── auth.store.ts <text:s text:c="12"/># Utilisateur connecté, token, tenant</text:p>
      <text:p text:style-name="Preformatted_20_Text"><text:s text:c="4"/>│ <text:s text:c="2"/>├── ui.store.ts <text:s text:c="14"/># Sidebar, thème, notifications</text:p>
      <text:p text:style-name="Preformatted_20_Text"><text:s text:c="4"/>│ <text:s text:c="2"/>└── ws.store.ts <text:s text:c="14"/># État connexion WebSocket live</text:p>
      <text:p text:style-name="Preformatted_20_Text"><text:s text:c="4"/>│</text:p>
      <text:p text:style-name="Preformatted_20_Text"><text:s text:c="4"/>├── hooks/ <text:s text:c="23"/># React Query hooks (données serveur)</text:p>
      <text:p text:style-name="Preformatted_20_Text"><text:s text:c="4"/>│ <text:s text:c="2"/>├── useAgents.ts</text:p>
      <text:p text:style-name="Preformatted_20_Text"><text:s text:c="4"/>│ <text:s text:c="2"/>├── useMetrics.ts</text:p>
      <text:p text:style-name="Preformatted_20_Text"><text:s text:c="4"/>│ <text:s text:c="2"/>├── useAlerts.ts</text:p>
      <text:p text:style-name="Preformatted_20_Text"><text:s text:c="4"/>│ <text:s text:c="2"/>├── useTickets.ts</text:p>
      <text:p text:style-name="Preformatted_20_Text"><text:s text:c="4"/>│ <text:s text:c="2"/>└── useWebSocket.ts <text:s text:c="10"/># Hook WS pour live métriques</text:p>
      <text:p text:style-name="Preformatted_20_Text"><text:s text:c="4"/>│</text:p>
      <text:p text:style-name="Preformatted_20_Text"><text:s text:c="4"/>├── types/ <text:s text:c="23"/># Types TypeScript partagés</text:p>
      <text:p text:style-name="Preformatted_20_Text"><text:s text:c="4"/>│ <text:s text:c="2"/>├── agent.ts</text:p>
      <text:p text:style-name="Preformatted_20_Text"><text:s text:c="4"/>│ <text:s text:c="2"/>├── metric.ts</text:p>
      <text:p text:style-name="Preformatted_20_Text"><text:s text:c="4"/>│ <text:s text:c="2"/>├── alert.ts</text:p>
      <text:p text:style-name="Preformatted_20_Text"><text:s text:c="4"/>│ <text:s text:c="2"/>├── ticket.ts</text:p>
      <text:p text:style-name="Preformatted_20_Text"><text:s text:c="4"/>│ <text:s text:c="2"/>├── user.ts</text:p>
      <text:p text:style-name="Preformatted_20_Text"><text:s text:c="4"/>│ <text:s text:c="2"/>└── api.ts <text:s text:c="19"/># Enveloppes API (pagination, erreurs)</text:p>
      <text:p text:style-name="Preformatted_20_Text"><text:s text:c="4"/>│</text:p>
      <text:p text:style-name="Preformatted_20_Text"><text:s text:c="4"/>├── components/</text:p>
      <text:p text:style-name="Preformatted_20_Text"><text:s text:c="4"/>│ <text:s text:c="2"/>├── ui/ <text:s text:c="22"/># Composants Shadcn/ui (générés)</text:p>
      <text:p text:style-name="Preformatted_20_Text"><text:s text:c="4"/>│ <text:s text:c="2"/>├── layout/</text:p>
      <text:p text:style-name="Preformatted_20_Text"><text:s text:c="4"/>│ <text:s text:c="2"/>│ <text:s text:c="2"/>├── AppShell.tsx <text:s text:c="9"/># Layout principal (sidebar + topbar + content)</text:p>
      <text:p text:style-name="Preformatted_20_Text"><text:s text:c="4"/>│ <text:s text:c="2"/>│ <text:s text:c="2"/>├── Sidebar.tsx</text:p>
      <text:p text:style-name="Preformatted_20_Text"><text:s text:c="4"/>│ <text:s text:c="2"/>│ <text:s text:c="2"/>├── Topbar.tsx</text:p>
      <text:p text:style-name="Preformatted_20_Text"><text:s text:c="4"/>│ <text:s text:c="2"/>│ <text:s text:c="2"/>└── PageHeader.tsx</text:p>
      <text:p text:style-name="Preformatted_20_Text"><text:s text:c="4"/>│ <text:s text:c="2"/>├── dashboard/</text:p>
      <text:p text:style-name="Preformatted_20_Text"><text:s text:c="4"/>│ <text:s text:c="2"/>│ <text:s text:c="2"/>├── StatCard.tsx</text:p>
      <text:p text:style-name="Preformatted_20_Text"><text:s text:c="4"/>│ <text:s text:c="2"/>│ <text:s text:c="2"/>├── AgentStatusChart.tsx</text:p>
      <text:p text:style-name="Preformatted_20_Text"><text:s text:c="4"/>│ <text:s text:c="2"/>│ <text:s text:c="2"/>└── RecentAlerts.tsx</text:p>
      <text:p text:style-name="Preformatted_20_Text"><text:s text:c="4"/>│ <text:s text:c="2"/>├── agents/</text:p>
      <text:p text:style-name="Preformatted_20_Text"><text:s text:c="4"/>│ <text:s text:c="2"/>│ <text:s text:c="2"/>├── AgentTable.tsx</text:p>
      <text:p text:style-name="Preformatted_20_Text"><text:s text:c="4"/>│ <text:s text:c="2"/>│ <text:s text:c="2"/>├── AgentStatusBadge.tsx</text:p>
      <text:p text:style-name="Preformatted_20_Text"><text:s text:c="4"/>│ <text:s text:c="2"/>│ <text:s text:c="2"/>├── AgentDetailPanel.tsx</text:p>
      <text:p text:style-name="Preformatted_20_Text"><text:s text:c="4"/>│ <text:s text:c="2"/>│ <text:s text:c="2"/>└── AgentCommandModal.tsx</text:p>
      <text:p text:style-name="Preformatted_20_Text"><text:s text:c="4"/>│ <text:s text:c="2"/>├── metrics/</text:p>
      <text:p text:style-name="Preformatted_20_Text"><text:s text:c="4"/>│ <text:s text:c="2"/>│ <text:s text:c="2"/>├── CpuChart.tsx</text:p>
      <text:p text:style-name="Preformatted_20_Text"><text:s text:c="4"/>│ <text:s text:c="2"/>│ <text:s text:c="2"/>├── RamChart.tsx</text:p>
      <text:p text:style-name="Preformatted_20_Text"><text:s text:c="4"/>│ <text:s text:c="2"/>│ <text:s text:c="2"/>├── DiskUsageBar.tsx</text:p>
      <text:p text:style-name="Preformatted_20_Text"><text:s text:c="4"/>│ <text:s text:c="2"/>│ <text:s text:c="2"/>└── MetricsGrid.tsx</text:p>
      <text:p text:style-name="Preformatted_20_Text"><text:s text:c="4"/>│ <text:s text:c="2"/>├── alerts/</text:p>
      <text:p text:style-name="Preformatted_20_Text"><text:s text:c="4"/>│ <text:s text:c="2"/>│ <text:s text:c="2"/>├── AlertList.tsx</text:p>
      <text:p text:style-name="Preformatted_20_Text"><text:s text:c="4"/>│ <text:s text:c="2"/>│ <text:s text:c="2"/>├── AlertRuleForm.tsx</text:p>
      <text:p text:style-name="Preformatted_20_Text"><text:s text:c="4"/>│ <text:s text:c="2"/>│ <text:s text:c="2"/>└── AlertSeverityBadge.tsx</text:p>
      <text:p text:style-name="Preformatted_20_Text"><text:s text:c="4"/>│ <text:s text:c="2"/>└── tickets/</text:p>
      <text:p text:style-name="Preformatted_20_Text"><text:soft-page-break/><text:s text:c="4"/>│ <text:s text:c="6"/>├── TicketList.tsx</text:p>
      <text:p text:style-name="Preformatted_20_Text"><text:s text:c="4"/>│ <text:s text:c="6"/>├── TicketDetail.tsx</text:p>
      <text:p text:style-name="Preformatted_20_Text"><text:s text:c="4"/>│ <text:s text:c="6"/>└── TicketForm.tsx</text:p>
      <text:p text:style-name="Preformatted_20_Text"><text:s text:c="4"/>│</text:p>
      <text:p text:style-name="Preformatted_20_Text"><text:s text:c="4"/>└── pages/</text:p>
      <text:p text:style-name="Preformatted_20_Text"><text:s text:c="8"/>├── LoginPage.tsx</text:p>
      <text:p text:style-name="Preformatted_20_Text"><text:s text:c="8"/>├── DashboardPage.tsx</text:p>
      <text:p text:style-name="Preformatted_20_Text"><text:s text:c="8"/>├── AgentsPage.tsx</text:p>
      <text:p text:style-name="Preformatted_20_Text"><text:s text:c="8"/>├── AgentDetailPage.tsx</text:p>
      <text:p text:style-name="Preformatted_20_Text"><text:s text:c="8"/>├── AlertsPage.tsx</text:p>
      <text:p text:style-name="Preformatted_20_Text"><text:s text:c="8"/>├── TicketsPage.tsx</text:p>
      <text:p text:style-name="Preformatted_20_Text"><text:s text:c="8"/>├── SettingsPage.tsx</text:p>
      <text:p text:style-name="Preformatted_20_Text"><text:s text:c="8"/>└── NotFoundPage.tsx</text:p>
      <text:h text:style-name="Heading_20_2" text:outline-level="2">5. Infrastructure — Docker &amp; Kubernetes</text:h>
      <text:p text:style-name="Preformatted_20_Text">infra/</text:p>
      <text:p text:style-name="Preformatted_20_Text">├── docker/</text:p>
      <text:p text:style-name="Preformatted_20_Text">│ <text:s text:c="2"/>├── docker-compose.yml <text:s text:c="11"/># Environnement de développement complet</text:p>
      <text:p text:style-name="Preformatted_20_Text">│ <text:s text:c="2"/>└── docker-compose.prod.yml <text:s text:c="6"/># Surcharge pour déploiement On-Premise</text:p>
      <text:p text:style-name="Preformatted_20_Text">│</text:p>
      <text:p text:style-name="Preformatted_20_Text">└── kubernetes/</text:p>
      <text:p text:style-name="Preformatted_20_Text"><text:s text:c="4"/>├── namespace.yaml</text:p>
      <text:p text:style-name="Preformatted_20_Text"><text:s text:c="4"/>├── backend/</text:p>
      <text:p text:style-name="Preformatted_20_Text"><text:s text:c="4"/>│ <text:s text:c="2"/>├── deployment.yaml</text:p>
      <text:p text:style-name="Preformatted_20_Text"><text:s text:c="4"/>│ <text:s text:c="2"/>├── service.yaml</text:p>
      <text:p text:style-name="Preformatted_20_Text"><text:s text:c="4"/>│ <text:s text:c="2"/>└── hpa.yaml</text:p>
      <text:p text:style-name="Preformatted_20_Text"><text:s text:c="4"/>├── frontend/</text:p>
      <text:p text:style-name="Preformatted_20_Text"><text:s text:c="4"/>│ <text:s text:c="2"/>├── deployment.yaml</text:p>
      <text:p text:style-name="Preformatted_20_Text"><text:s text:c="4"/>│ <text:s text:c="2"/>└── service.yaml</text:p>
      <text:p text:style-name="Preformatted_20_Text"><text:s text:c="4"/>├── postgres/</text:p>
      <text:p text:style-name="Preformatted_20_Text"><text:s text:c="4"/>│ <text:s text:c="2"/>├── statefulset.yaml</text:p>
      <text:p text:style-name="Preformatted_20_Text"><text:s text:c="4"/>│ <text:s text:c="2"/>├── service.yaml</text:p>
      <text:p text:style-name="Preformatted_20_Text"><text:s text:c="4"/>│ <text:s text:c="2"/>└── pvc.yaml</text:p>
      <text:p text:style-name="Preformatted_20_Text"><text:s text:c="4"/>├── ingress/</text:p>
      <text:p text:style-name="Preformatted_20_Text"><text:s text:c="4"/>│ <text:s text:c="2"/>└── ingress.yaml</text:p>
      <text:p text:style-name="Preformatted_20_Text"><text:s text:c="4"/>└── config/</text:p>
      <text:p text:style-name="Preformatted_20_Text"><text:s text:c="8"/>├── backend-configmap.yaml</text:p>
      <text:p text:style-name="Preformatted_20_Text"><text:s text:c="8"/>└── backend-secret.yaml</text:p>
      <text:h text:style-name="Heading_20_3" text:outline-level="3">5.1 — docker-compose.yml (développement)</text:h>
      <text:p text:style-name="Preformatted_20_Text">version: "3.9"</text:p>
      <text:p text:style-name="Preformatted_20_Text"/>
      <text:p text:style-name="Preformatted_20_Text">services:</text:p>
      <text:p text:style-name="Preformatted_20_Text"/>
      <text:p text:style-name="Preformatted_20_Text"><text:s text:c="2"/>postgres:</text:p>
      <text:p text:style-name="Preformatted_20_Text"><text:s text:c="4"/>image: timescale/timescaledb:latest-pg16</text:p>
      <text:p text:style-name="Preformatted_20_Text"><text:s text:c="4"/>container_name: leo-postgres</text:p>
      <text:p text:style-name="Preformatted_20_Text"><text:s text:c="4"/>restart: unless-stopped</text:p>
      <text:p text:style-name="Preformatted_20_Text"><text:s text:c="4"/>environment:</text:p>
      <text:p text:style-name="Preformatted_20_Text"><text:s text:c="6"/>POSTGRES_DB: <text:s text:c="6"/>leoone</text:p>
      <text:p text:style-name="Preformatted_20_Text"><text:s text:c="6"/>POSTGRES_USER: <text:s text:c="4"/>leoone</text:p>
      <text:p text:style-name="Preformatted_20_Text"><text:s text:c="6"/>POSTGRES_PASSWORD: ${POSTGRES_PASSWORD}</text:p>
      <text:p text:style-name="Preformatted_20_Text"><text:s text:c="4"/>volumes:</text:p>
      <text:p text:style-name="Preformatted_20_Text"><text:s text:c="6"/>- postgres_data:/var/lib/postgresql/data</text:p>
      <text:p text:style-name="Preformatted_20_Text"><text:s text:c="6"/>- ./backend/migrations:/docker-entrypoint-initdb.d:ro</text:p>
      <text:p text:style-name="Preformatted_20_Text"><text:s text:c="4"/>ports:</text:p>
      <text:p text:style-name="Preformatted_20_Text"><text:s text:c="6"/>- "5432:5432"</text:p>
      <text:p text:style-name="Preformatted_20_Text"><text:s text:c="4"/>healthcheck:</text:p>
      <text:p text:style-name="Preformatted_20_Text"><text:s text:c="6"/>test: ["CMD-SHELL", "pg_isready -U leoone -d leoone"]</text:p>
      <text:p text:style-name="Preformatted_20_Text"><text:s text:c="6"/>interval: 10s</text:p>
      <text:p text:style-name="Preformatted_20_Text"><text:s text:c="6"/>timeout: 5s</text:p>
      <text:p text:style-name="Preformatted_20_Text"><text:s text:c="6"/>retries: 5</text:p>
      <text:p text:style-name="Preformatted_20_Text"/>
      <text:p text:style-name="Preformatted_20_Text"><text:s text:c="2"/>backend:</text:p>
      <text:p text:style-name="Preformatted_20_Text"><text:s text:c="4"/>build:</text:p>
      <text:p text:style-name="Preformatted_20_Text"><text:s text:c="6"/>context: ./backend</text:p>
      <text:p text:style-name="Preformatted_20_Text"><text:s text:c="6"/>dockerfile: Dockerfile</text:p>
      <text:p text:style-name="Preformatted_20_Text"><text:s text:c="4"/>container_name: leo-backend</text:p>
      <text:p text:style-name="Preformatted_20_Text"><text:s text:c="4"/>restart: unless-stopped</text:p>
      <text:p text:style-name="Preformatted_20_Text"><text:s text:c="4"/>depends_on:</text:p>
      <text:p text:style-name="Preformatted_20_Text"><text:s text:c="6"/>postgres:</text:p>
      <text:p text:style-name="Preformatted_20_Text"><text:s text:c="8"/>condition: service_healthy</text:p>
      <text:p text:style-name="Preformatted_20_Text"><text:s text:c="4"/>environment:</text:p>
      <text:p text:style-name="Preformatted_20_Text"><text:s text:c="6"/>APP_ENV: <text:s text:c="7"/>development</text:p>
      <text:p text:style-name="Preformatted_20_Text"><text:s text:c="6"/>DATABASE_URL: <text:s text:c="2"/>"postgres://leoone:${POSTGRES_PASSWORD}@postgres:5432/leoone?sslmode=disable"</text:p>
      <text:p text:style-name="Preformatted_20_Text"><text:s text:c="6"/>JWT_SECRET: <text:s text:c="4"/>${JWT_SECRET}</text:p>
      <text:p text:style-name="Preformatted_20_Text"><text:s text:c="6"/>CA_CERT_PATH: <text:s text:c="2"/>/certs/ca.crt</text:p>
      <text:p text:style-name="Preformatted_20_Text"><text:s text:c="6"/>CA_KEY_PATH: <text:s text:c="3"/>/certs/ca.key</text:p>
      <text:p text:style-name="Preformatted_20_Text"><text:s text:c="6"/>SERVER_ADDR: <text:s text:c="3"/>"0.0.0.0:8080"</text:p>
      <text:p text:style-name="Preformatted_20_Text"><text:s text:c="6"/>WS_AGENT_ADDR: <text:s/>"0.0.0.0:8081"</text:p>
      <text:p text:style-name="Preformatted_20_Text"><text:s text:c="6"/>LOG_LEVEL: <text:s text:c="5"/>debug</text:p>
      <text:p text:style-name="Preformatted_20_Text"><text:s text:c="4"/>volumes:</text:p>
      <text:p text:style-name="Preformatted_20_Text"><text:s text:c="6"/>- ./infra/certs:/certs:ro</text:p>
      <text:p text:style-name="Preformatted_20_Text"><text:s text:c="4"/>ports:</text:p>
      <text:p text:style-name="Preformatted_20_Text"><text:s text:c="6"/>- "8080:8080"</text:p>
      <text:p text:style-name="Preformatted_20_Text"><text:s text:c="6"/>- "8081:8081"</text:p>
      <text:p text:style-name="Preformatted_20_Text"><text:s text:c="4"/>healthcheck:</text:p>
      <text:p text:style-name="Preformatted_20_Text"><text:s text:c="6"/>test: ["CMD", "curl", "-f", "http://localhost:8080/health"]</text:p>
      <text:p text:style-name="Preformatted_20_Text"><text:s text:c="6"/>interval: 15s</text:p>
      <text:p text:style-name="Preformatted_20_Text"><text:s text:c="6"/>timeout: 5s</text:p>
      <text:p text:style-name="Preformatted_20_Text"><text:s text:c="6"/>retries: 3</text:p>
      <text:p text:style-name="Preformatted_20_Text"/>
      <text:p text:style-name="Preformatted_20_Text"><text:s text:c="2"/>frontend:</text:p>
      <text:p text:style-name="Preformatted_20_Text"><text:s text:c="4"/>build:</text:p>
      <text:p text:style-name="Preformatted_20_Text"><text:s text:c="6"/>context: ./frontend</text:p>
      <text:p text:style-name="Preformatted_20_Text"><text:s text:c="6"/>dockerfile: Dockerfile</text:p>
      <text:p text:style-name="Preformatted_20_Text"><text:s text:c="6"/>target: development</text:p>
      <text:p text:style-name="Preformatted_20_Text"><text:s text:c="4"/>container_name: leo-frontend</text:p>
      <text:p text:style-name="Preformatted_20_Text"><text:s text:c="4"/>restart: unless-stopped</text:p>
      <text:p text:style-name="Preformatted_20_Text"><text:s text:c="4"/>depends_on:</text:p>
      <text:p text:style-name="Preformatted_20_Text"><text:s text:c="6"/>- backend</text:p>
      <text:p text:style-name="Preformatted_20_Text"><text:s text:c="4"/>environment:</text:p>
      <text:p text:style-name="Preformatted_20_Text"><text:s text:c="6"/>VITE_API_BASE_URL: "http://localhost:8080"</text:p>
      <text:p text:style-name="Preformatted_20_Text"><text:s text:c="6"/>VITE_WS_URL: <text:s text:c="6"/>"ws://localhost:8081"</text:p>
      <text:p text:style-name="Preformatted_20_Text"><text:s text:c="4"/>volumes:</text:p>
      <text:p text:style-name="Preformatted_20_Text"><text:s text:c="6"/>- ./frontend/src:/app/src</text:p>
      <text:p text:style-name="Preformatted_20_Text"><text:s text:c="6"/>- ./frontend/public:/app/public</text:p>
      <text:p text:style-name="Preformatted_20_Text"><text:s text:c="4"/>ports:</text:p>
      <text:p text:style-name="Preformatted_20_Text"><text:s text:c="6"/>- "5173:5173"</text:p>
      <text:p text:style-name="Preformatted_20_Text"/>
      <text:p text:style-name="Preformatted_20_Text">volumes:</text:p>
      <text:p text:style-name="Preformatted_20_Text"><text:s text:c="2"/>postgres_data:</text:p>
      <text:h text:style-name="Heading_20_3" text:outline-level="3">5.2 — backend/Dockerfile</text:h>
      <text:p text:style-name="Preformatted_20_Text"># Stage 1 : Build</text:p>
      <text:p text:style-name="Preformatted_20_Text">FROM golang:1.23-alpine AS builder</text:p>
      <text:p text:style-name="Preformatted_20_Text"/>
      <text:p text:style-name="Preformatted_20_Text">WORKDIR /app</text:p>
      <text:p text:style-name="Preformatted_20_Text">COPY go.mod go.sum ./</text:p>
      <text:p text:style-name="Preformatted_20_Text">RUN go mod download</text:p>
      <text:p text:style-name="Preformatted_20_Text">COPY . .</text:p>
      <text:p text:style-name="Preformatted_20_Text"/>
      <text:p text:style-name="Preformatted_20_Text">RUN CGO_ENABLED=0 GOOS=linux go build \</text:p>
      <text:p text:style-name="Preformatted_20_Text"><text:s text:c="4"/>-ldflags="-s -w -X main.Version=${VERSION:-dev}" \</text:p>
      <text:p text:style-name="Preformatted_20_Text"><text:soft-page-break/><text:s text:c="4"/>-o /leo-server ./cmd/server</text:p>
      <text:p text:style-name="Preformatted_20_Text"/>
      <text:p text:style-name="Preformatted_20_Text"># Stage 2 : Image finale minimale (distroless)</text:p>
      <text:p text:style-name="Preformatted_20_Text">FROM gcr.io/distroless/static-debian12</text:p>
      <text:p text:style-name="Preformatted_20_Text"/>
      <text:p text:style-name="Preformatted_20_Text">COPY --from=builder /leo-server /leo-server</text:p>
      <text:p text:style-name="Preformatted_20_Text"/>
      <text:p text:style-name="Preformatted_20_Text">EXPOSE 8080 8081</text:p>
      <text:p text:style-name="Preformatted_20_Text"/>
      <text:p text:style-name="Preformatted_20_Text">ENTRYPOINT ["/leo-server"]</text:p>
      <text:h text:style-name="Heading_20_3" text:outline-level="3">5.3 — frontend/Dockerfile</text:h>
      <text:p text:style-name="Preformatted_20_Text"># Stage development (hot reload Vite)</text:p>
      <text:p text:style-name="Preformatted_20_Text">FROM node:22-alpine AS development</text:p>
      <text:p text:style-name="Preformatted_20_Text">WORKDIR /app</text:p>
      <text:p text:style-name="Preformatted_20_Text">COPY package*.json ./</text:p>
      <text:p text:style-name="Preformatted_20_Text">RUN npm ci</text:p>
      <text:p text:style-name="Preformatted_20_Text">COPY . .</text:p>
      <text:p text:style-name="Preformatted_20_Text">EXPOSE 5173</text:p>
      <text:p text:style-name="Preformatted_20_Text">CMD ["npm", "run", "dev", "--", "--host", "0.0.0.0"]</text:p>
      <text:p text:style-name="Preformatted_20_Text"/>
      <text:p text:style-name="Preformatted_20_Text"># Stage build production</text:p>
      <text:p text:style-name="Preformatted_20_Text">FROM node:22-alpine AS builder</text:p>
      <text:p text:style-name="Preformatted_20_Text">WORKDIR /app</text:p>
      <text:p text:style-name="Preformatted_20_Text">COPY package*.json ./</text:p>
      <text:p text:style-name="Preformatted_20_Text">RUN npm ci</text:p>
      <text:p text:style-name="Preformatted_20_Text">COPY . .</text:p>
      <text:p text:style-name="Preformatted_20_Text">RUN npm run build</text:p>
      <text:p text:style-name="Preformatted_20_Text"/>
      <text:p text:style-name="Preformatted_20_Text"># Stage production (nginx statique)</text:p>
      <text:p text:style-name="Preformatted_20_Text">FROM nginx:1.27-alpine AS production</text:p>
      <text:p text:style-name="Preformatted_20_Text">COPY --from=builder /app/dist /usr/share/nginx/html</text:p>
      <text:p text:style-name="Preformatted_20_Text">COPY nginx.conf /etc/nginx/conf.d/default.conf</text:p>
      <text:p text:style-name="Preformatted_20_Text">EXPOSE 80</text:p>
      <text:h text:style-name="Heading_20_3" text:outline-level="3">5.4 — agent/Dockerfile.builder (cross-compilation C)</text:h>
      <text:p text:style-name="Preformatted_20_Text">FROM debian:bookworm-slim</text:p>
      <text:p text:style-name="Preformatted_20_Text"/>
      <text:p text:style-name="Preformatted_20_Text">RUN apt-get update &amp;&amp; apt-get install -y --no-install-recommends \</text:p>
      <text:p text:style-name="Preformatted_20_Text"><text:s text:c="4"/>cmake ninja-build gcc g++ \</text:p>
      <text:p text:style-name="Preformatted_20_Text"><text:s text:c="4"/>gcc-mingw-w64-x86-64 \</text:p>
      <text:p text:style-name="Preformatted_20_Text"><text:s text:c="4"/>libssl-dev make \</text:p>
      <text:p text:style-name="Preformatted_20_Text"><text:s text:c="4"/>&amp;&amp; rm -rf /var/lib/apt/lists/*</text:p>
      <text:p text:style-name="Preformatted_20_Text"/>
      <text:p text:style-name="Preformatted_20_Text">WORKDIR /build</text:p>
      <text:p text:style-name="Preformatted_20_Text">COPY . .</text:p>
      <text:p text:style-name="Preformatted_20_Text"/>
      <text:p text:style-name="Preformatted_20_Text"># Build Linux x86_64</text:p>
      <text:p text:style-name="Preformatted_20_Text">RUN cmake -B build/linux-amd64 -G Ninja \</text:p>
      <text:p text:style-name="Preformatted_20_Text"><text:s text:c="6"/>-DCMAKE_BUILD_TYPE=Release -DTARGET_OS=linux \</text:p>
      <text:p text:style-name="Preformatted_20_Text"><text:s text:c="4"/>&amp;&amp; cmake --build build/linux-amd64</text:p>
      <text:p text:style-name="Preformatted_20_Text"/>
      <text:p text:style-name="Preformatted_20_Text"># Build Windows x86_64 (cross-compilation)</text:p>
      <text:p text:style-name="Preformatted_20_Text">RUN cmake -B build/windows-amd64 -G Ninja \</text:p>
      <text:p text:style-name="Preformatted_20_Text"><text:s text:c="6"/>-DCMAKE_BUILD_TYPE=Release \</text:p>
      <text:p text:style-name="Preformatted_20_Text"><text:s text:c="6"/>-DCMAKE_TOOLCHAIN_FILE=cmake/toolchains/mingw-w64.cmake \</text:p>
      <text:p text:style-name="Preformatted_20_Text"><text:s text:c="6"/>-DTARGET_OS=windows \</text:p>
      <text:p text:style-name="Preformatted_20_Text"><text:s text:c="4"/>&amp;&amp; cmake --build build/windows-amd64</text:p>
      <text:h text:style-name="Heading_20_3" text:outline-level="3">5.5 — kubernetes/backend/deployment.yaml</text:h>
      <text:p text:style-name="Preformatted_20_Text">apiVersion: apps/v1</text:p>
      <text:p text:style-name="Preformatted_20_Text">kind: Deployment</text:p>
      <text:p text:style-name="Preformatted_20_Text">metadata:</text:p>
      <text:p text:style-name="Preformatted_20_Text"><text:s text:c="2"/>name: leo-backend</text:p>
      <text:p text:style-name="Preformatted_20_Text"><text:s text:c="2"/>namespace: leo-one</text:p>
      <text:p text:style-name="Preformatted_20_Text">spec:</text:p>
      <text:p text:style-name="Preformatted_20_Text"><text:s text:c="2"/>replicas: 2</text:p>
      <text:p text:style-name="Preformatted_20_Text"><text:s text:c="2"/>selector:</text:p>
      <text:p text:style-name="Preformatted_20_Text"><text:s text:c="4"/>matchLabels:</text:p>
      <text:p text:style-name="Preformatted_20_Text"><text:s text:c="6"/>app: leo-backend</text:p>
      <text:p text:style-name="Preformatted_20_Text"><text:s text:c="2"/>template:</text:p>
      <text:p text:style-name="Preformatted_20_Text"><text:s text:c="4"/>metadata:</text:p>
      <text:p text:style-name="Preformatted_20_Text"><text:s text:c="6"/>labels:</text:p>
      <text:p text:style-name="Preformatted_20_Text"><text:s text:c="8"/>app: leo-backend</text:p>
      <text:p text:style-name="Preformatted_20_Text"><text:s text:c="4"/>spec:</text:p>
      <text:p text:style-name="Preformatted_20_Text"><text:s text:c="6"/>containers:</text:p>
      <text:p text:style-name="Preformatted_20_Text"><text:s text:c="8"/>- name: backend</text:p>
      <text:p text:style-name="Preformatted_20_Text"><text:s text:c="10"/>image: ghcr.io/yourorg/leo-backend:latest</text:p>
      <text:p text:style-name="Preformatted_20_Text"><text:s text:c="10"/>ports:</text:p>
      <text:p text:style-name="Preformatted_20_Text"><text:s text:c="12"/>- containerPort: 8080</text:p>
      <text:p text:style-name="Preformatted_20_Text"><text:s text:c="12"/>- containerPort: 8081</text:p>
      <text:p text:style-name="Preformatted_20_Text"><text:s text:c="10"/>envFrom:</text:p>
      <text:p text:style-name="Preformatted_20_Text"><text:s text:c="12"/>- configMapRef:</text:p>
      <text:p text:style-name="Preformatted_20_Text"><text:s text:c="16"/>name: backend-config</text:p>
      <text:p text:style-name="Preformatted_20_Text"><text:s text:c="12"/>- secretRef:</text:p>
      <text:p text:style-name="Preformatted_20_Text"><text:s text:c="16"/>name: backend-secret</text:p>
      <text:p text:style-name="Preformatted_20_Text"><text:s text:c="10"/>readinessProbe:</text:p>
      <text:p text:style-name="Preformatted_20_Text"><text:s text:c="12"/>httpGet:</text:p>
      <text:p text:style-name="Preformatted_20_Text"><text:s text:c="14"/>path: /health</text:p>
      <text:p text:style-name="Preformatted_20_Text"><text:s text:c="14"/>port: 8080</text:p>
      <text:p text:style-name="Preformatted_20_Text"><text:s text:c="12"/>initialDelaySeconds: 5</text:p>
      <text:p text:style-name="Preformatted_20_Text"><text:s text:c="12"/>periodSeconds: 10</text:p>
      <text:p text:style-name="Preformatted_20_Text"><text:s text:c="10"/>resources:</text:p>
      <text:p text:style-name="Preformatted_20_Text"><text:s text:c="12"/>requests:</text:p>
      <text:p text:style-name="Preformatted_20_Text"><text:s text:c="14"/>cpu: "250m"</text:p>
      <text:p text:style-name="Preformatted_20_Text"><text:s text:c="14"/>memory: "256Mi"</text:p>
      <text:p text:style-name="Preformatted_20_Text"><text:s text:c="12"/>limits:</text:p>
      <text:p text:style-name="Preformatted_20_Text"><text:s text:c="14"/>cpu: "1000m"</text:p>
      <text:p text:style-name="Preformatted_20_Text"><text:s text:c="14"/>memory: "1Gi"</text:p>
      <text:h text:style-name="Heading_20_3" text:outline-level="3">5.6 — kubernetes/backend/hpa.yaml (Autoscaling)</text:h>
      <text:p text:style-name="Preformatted_20_Text">apiVersion: autoscaling/v2</text:p>
      <text:p text:style-name="Preformatted_20_Text">kind: HorizontalPodAutoscaler</text:p>
      <text:p text:style-name="Preformatted_20_Text">metadata:</text:p>
      <text:p text:style-name="Preformatted_20_Text"><text:s text:c="2"/>name: leo-backend-hpa</text:p>
      <text:p text:style-name="Preformatted_20_Text"><text:s text:c="2"/>namespace: leo-one</text:p>
      <text:p text:style-name="Preformatted_20_Text">spec:</text:p>
      <text:p text:style-name="Preformatted_20_Text"><text:s text:c="2"/>scaleTargetRef:</text:p>
      <text:p text:style-name="Preformatted_20_Text"><text:s text:c="4"/>apiVersion: apps/v1</text:p>
      <text:p text:style-name="Preformatted_20_Text"><text:s text:c="4"/>kind: Deployment</text:p>
      <text:p text:style-name="Preformatted_20_Text"><text:s text:c="4"/>name: leo-backend</text:p>
      <text:p text:style-name="Preformatted_20_Text"><text:s text:c="2"/>minReplicas: 2</text:p>
      <text:p text:style-name="Preformatted_20_Text"><text:s text:c="2"/>maxReplicas: 10</text:p>
      <text:p text:style-name="Preformatted_20_Text"><text:s text:c="2"/>metrics:</text:p>
      <text:p text:style-name="Preformatted_20_Text"><text:s text:c="4"/>- type: Resource</text:p>
      <text:p text:style-name="Preformatted_20_Text"><text:s text:c="6"/>resource:</text:p>
      <text:p text:style-name="Preformatted_20_Text"><text:s text:c="8"/>name: cpu</text:p>
      <text:p text:style-name="Preformatted_20_Text"><text:s text:c="8"/>target:</text:p>
      <text:p text:style-name="Preformatted_20_Text"><text:s text:c="10"/>type: Utilization</text:p>
      <text:p text:style-name="Preformatted_20_Text"><text:s text:c="10"/>averageUtilization: 70</text:p>
      <text:h text:style-name="Heading_20_3" text:outline-level="3">5.7 — kubernetes/ingress/ingress.yaml</text:h>
      <text:p text:style-name="Preformatted_20_Text">apiVersion: networking.k8s.io/v1</text:p>
      <text:p text:style-name="Preformatted_20_Text">kind: Ingress</text:p>
      <text:p text:style-name="Preformatted_20_Text">metadata:</text:p>
      <text:p text:style-name="Preformatted_20_Text"><text:s text:c="2"/>name: leo-ingress</text:p>
      <text:p text:style-name="Preformatted_20_Text"><text:soft-page-break/><text:s text:c="2"/>namespace: leo-one</text:p>
      <text:p text:style-name="Preformatted_20_Text"><text:s text:c="2"/>annotations:</text:p>
      <text:p text:style-name="Preformatted_20_Text"><text:s text:c="4"/>nginx.ingress.kubernetes.io/ssl-redirect: "true"</text:p>
      <text:p text:style-name="Preformatted_20_Text"><text:s text:c="4"/>nginx.ingress.kubernetes.io/proxy-read-timeout: "3600"</text:p>
      <text:p text:style-name="Preformatted_20_Text"><text:s text:c="4"/>nginx.ingress.kubernetes.io/proxy-send-timeout: "3600"</text:p>
      <text:p text:style-name="Preformatted_20_Text"><text:s text:c="4"/>cert-manager.io/cluster-issuer: "letsencrypt-prod"</text:p>
      <text:p text:style-name="Preformatted_20_Text">spec:</text:p>
      <text:p text:style-name="Preformatted_20_Text"><text:s text:c="2"/>ingressClassName: nginx</text:p>
      <text:p text:style-name="Preformatted_20_Text"><text:s text:c="2"/>tls:</text:p>
      <text:p text:style-name="Preformatted_20_Text"><text:s text:c="4"/>- hosts:</text:p>
      <text:p text:style-name="Preformatted_20_Text"><text:s text:c="8"/>- rmm.yourdomain.com</text:p>
      <text:p text:style-name="Preformatted_20_Text"><text:s text:c="6"/>secretName: leo-tls</text:p>
      <text:p text:style-name="Preformatted_20_Text"><text:s text:c="2"/>rules:</text:p>
      <text:p text:style-name="Preformatted_20_Text"><text:s text:c="4"/>- host: rmm.yourdomain.com</text:p>
      <text:p text:style-name="Preformatted_20_Text"><text:s text:c="6"/>http:</text:p>
      <text:p text:style-name="Preformatted_20_Text"><text:s text:c="8"/>paths:</text:p>
      <text:p text:style-name="Preformatted_20_Text"><text:s text:c="10"/>- path: /ws/agent</text:p>
      <text:p text:style-name="Preformatted_20_Text"><text:s text:c="12"/>pathType: Prefix</text:p>
      <text:p text:style-name="Preformatted_20_Text"><text:s text:c="12"/>backend:</text:p>
      <text:p text:style-name="Preformatted_20_Text"><text:s text:c="14"/>service:</text:p>
      <text:p text:style-name="Preformatted_20_Text"><text:s text:c="16"/>name: leo-backend</text:p>
      <text:p text:style-name="Preformatted_20_Text"><text:s text:c="16"/>port:</text:p>
      <text:p text:style-name="Preformatted_20_Text"><text:s text:c="18"/>number: 8081</text:p>
      <text:p text:style-name="Preformatted_20_Text"><text:s text:c="10"/>- path: /api</text:p>
      <text:p text:style-name="Preformatted_20_Text"><text:s text:c="12"/>pathType: Prefix</text:p>
      <text:p text:style-name="Preformatted_20_Text"><text:s text:c="12"/>backend:</text:p>
      <text:p text:style-name="Preformatted_20_Text"><text:s text:c="14"/>service:</text:p>
      <text:p text:style-name="Preformatted_20_Text"><text:s text:c="16"/>name: leo-backend</text:p>
      <text:p text:style-name="Preformatted_20_Text"><text:s text:c="16"/>port:</text:p>
      <text:p text:style-name="Preformatted_20_Text"><text:s text:c="18"/>number: 8080</text:p>
      <text:p text:style-name="Preformatted_20_Text"><text:s text:c="10"/>- path: /</text:p>
      <text:p text:style-name="Preformatted_20_Text"><text:s text:c="12"/>pathType: Prefix</text:p>
      <text:p text:style-name="Preformatted_20_Text"><text:s text:c="12"/>backend:</text:p>
      <text:p text:style-name="Preformatted_20_Text"><text:s text:c="14"/>service:</text:p>
      <text:p text:style-name="Preformatted_20_Text"><text:s text:c="16"/>name: leo-frontend</text:p>
      <text:p text:style-name="Preformatted_20_Text"><text:s text:c="16"/>port:</text:p>
      <text:p text:style-name="Preformatted_20_Text"><text:s text:c="18"/>number: 80</text:p>
      <text:h text:style-name="Heading_20_2" text:outline-level="2">6. Récapitulatif Phase 2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Composant</text:p>
          </table:table-cell>
          <table:table-cell table:style-name="Table1.A1" office:value-type="string">
            <text:p text:style-name="Table_20_Heading">Technologie</text:p>
          </table:table-cell>
          <table:table-cell table:style-name="Table1.A1" office:value-type="string">
            <text:p text:style-name="Table_20_Heading">Port</text:p>
          </table:table-cell>
        </table:table-row>
        <table:table-row>
          <table:table-cell table:style-name="Table1.A1" office:value-type="string">
            <text:p text:style-name="Table_20_Contents">Agent C</text:p>
          </table:table-cell>
          <table:table-cell table:style-name="Table1.A1" office:value-type="string">
            <text:p text:style-name="Table_20_Contents">CMake, libwebsockets, cJSON, OpenSSL</text:p>
          </table:table-cell>
          <table:table-cell table:style-name="Table1.A1" office:value-type="string">
            <text:p text:style-name="Table_20_Contents">—</text:p>
          </table:table-cell>
        </table:table-row>
        <table:table-row>
          <table:table-cell table:style-name="Table1.A1" office:value-type="string">
            <text:p text:style-name="Table_20_Contents">Backend Go</text:p>
          </table:table-cell>
          <table:table-cell table:style-name="Table1.A1" office:value-type="string">
            <text:p text:style-name="Table_20_Contents">Chi, pgx/v5, gorilla/websocket</text:p>
          </table:table-cell>
          <table:table-cell table:style-name="Table1.A1" office:value-type="string">
            <text:p text:style-name="Table_20_Contents">8080 (REST), 8081 (WSS)</text:p>
          </table:table-cell>
        </table:table-row>
        <table:table-row>
          <table:table-cell table:style-name="Table1.A1" office:value-type="string">
            <text:p text:style-name="Table_20_Contents">Frontend</text:p>
          </table:table-cell>
          <table:table-cell table:style-name="Table1.A1" office:value-type="string">
            <text:p text:style-name="Table_20_Contents">Vite, React 18, Shadcn/ui, Zustand, React Query</text:p>
          </table:table-cell>
          <table:table-cell table:style-name="Table1.A1" office:value-type="string">
            <text:p text:style-name="Table_20_Contents">5173 (dev), 80 (prod)</text:p>
          </table:table-cell>
        </table:table-row>
        <table:table-row>
          <table:table-cell table:style-name="Table1.A1" office:value-type="string">
            <text:p text:style-name="Table_20_Contents">Base de données</text:p>
          </table:table-cell>
          <table:table-cell table:style-name="Table1.A1" office:value-type="string">
            <text:p text:style-name="Table_20_Contents">PostgreSQL 16 + TimescaleDB</text:p>
          </table:table-cell>
          <table:table-cell table:style-name="Table1.A1" office:value-type="string">
            <text:p text:style-name="Table_20_Contents">5432</text:p>
          </table:table-cell>
        </table:table-row>
        <table:table-row>
          <table:table-cell table:style-name="Table1.A1" office:value-type="string">
            <text:p text:style-name="Table_20_Contents">Ingress (K8s)</text:p>
          </table:table-cell>
          <table:table-cell table:style-name="Table1.A1" office:value-type="string">
            <text:p text:style-name="Table_20_Contents">NGINX Ingress + cert-manager (Let's Encrypt)</text:p>
          </table:table-cell>
          <table:table-cell table:style-name="Table1.A1" office:value-type="string">
            <text:p text:style-name="Table_20_Contents">443</text:p>
          </table:table-cell>
        </table:table-row>
      </table:table>
      <text:p text:style-name="P6"/>
      <text:p text:style-name="Horizontal_20_Line"/>
      <text:p text:style-name="P7">Leo-One RMM — Document Phase 2 — Confidentie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fr" fo:country="FR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.499cm" fo:margin-right="2.499cm" fo:margin-top="2.499cm" fo:margin-bottom="2.499cm" style:contextual-spacing="false"/>
      <style:text-properties fo:color="#1a1a1a" loext:opacity="100%" style:font-name="Arial" fo:font-family="Arial, sans-serif" fo:font-size="11pt" style:font-name-asian="Arial" style:font-family-asian="Arial, sans-serif" style:font-size-asian="11pt" style:font-name-complex="Arial" style:font-family-complex="Arial, sans-serif" style:font-size-complex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padding-left="0cm" fo:padding-right="0cm" fo:padding-top="0cm" fo:padding-bottom="0.212cm" fo:border-left="none" fo:border-right="none" fo:border-top="none" fo:border-bottom="2.24pt solid #1e3a5f"/>
      <style:text-properties fo:color="#1e3a5f" loext:opacity="100%" style:font-name="Noto Sans" fo:font-family="'Noto Sans'" style:font-pitch="variable" fo:font-size="20pt" fo:font-weight="bold" style:font-size-asian="20pt" style:font-weight-asian="bold" style:font-size-complex="2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60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847cm" fo:margin-bottom="0.212cm" style:contextual-spacing="false" fo:padding-left="0cm" fo:padding-right="0cm" fo:padding-top="0cm" fo:padding-bottom="0.106cm" fo:border-left="none" fo:border-right="none" fo:border-top="none" fo:border-bottom="0.06pt solid #aac4e0"/>
      <style:text-properties fo:color="#1e3a5f" loext:opacity="100%" style:font-name="Liberation Serif" fo:font-family="'Liberation Serif'" style:font-family-generic="roman" style:font-pitch="variable" fo:font-size="15pt" fo:font-weight="bold" style:font-name-asian="Noto Serif CJK SC" style:font-family-asian="'Noto Serif CJK SC'" style:font-family-generic-asian="system" style:font-pitch-asian="variable" style:font-size-asian="15pt" style:font-weight-asian="bold" style:font-name-complex="Noto Sans Devanagari1" style:font-family-complex="'Noto Sans Devanagari'" style:font-family-generic-complex="system" style:font-pitch-complex="variable" style:font-size-complex="15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529cm" fo:margin-bottom="0.212cm" style:contextual-spacing="false"/>
      <style:text-properties fo:color="#2c5f8a" loext:opacity="100%"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left="0.265cm" fo:margin-right="0.265cm" fo:margin-top="0.265cm" fo:margin-bottom="0.265cm" style:contextual-spacing="false" fo:line-height="150%" fo:padding-left="0.318cm" fo:padding-right="0cm" fo:padding-top="0.318cm" fo:padding-bottom="0.318cm" fo:border-left="0.06pt solid #d0d7e2" fo:border-right="none" fo:border-top="0.06pt solid #d0d7e2" fo:border-bottom="0.06pt solid #d0d7e2"/>
      <style:text-properties style:font-name="Courier New" fo:font-family="'Courier New', monospace" fo:font-size="9pt" style:font-name-asian="Courier New" style:font-family-asian="'Courier New', monospace" style:font-size-asian="9pt" style:font-name-complex="Courier New" style:font-family-complex="'Courier New', monospace" style:font-size-complex="9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color="#ffffff" loext:opacity="100%"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fo:font-family="'Courier New', monospace" fo:font-size="9pt" fo:background-color="#f4f6f9" style:font-name-asian="Courier New" style:font-family-asian="'Courier New', monospace" style:font-size-asian="9pt" style:font-name-complex="Courier New" style:font-family-complex="'Courier New', monospace" style:font-size-complex="9pt" loext:padding-left="0.318cm" loext:padding-right="0cm" loext:padding-top="0.318cm" loext:padding-bottom="0.318cm" loext:border-left="0.06pt solid #d0d7e2" loext:border-right="none" loext:border-top="0.06pt solid #d0d7e2" loext:border-bottom="0.06pt solid #d0d7e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eo-One RMM — Phase 2 : Arborescence &amp; Docker/K8s</dc:title>
    <meta:document-statistic meta:table-count="1" meta:image-count="0" meta:object-count="0" meta:page-count="5" meta:paragraph-count="521" meta:word-count="2055" meta:character-count="17366" meta:non-whitespace-character-count="12102"/>
    <meta:generator>LibreOffice/24.2.7.2$Linux_X86_64 LibreOffice_project/420$Build-2</meta:generator>
    <meta:user-defined meta:name=""/>
  </office:meta>
</office:document-meta>
</file>